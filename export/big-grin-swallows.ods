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>
  <office:body>
    <office:spreadsheet>
      <table:table table:name="Status">
        <table:table-row>
          <table:table-cell office:value-type="string">
            <text:p>field</text:p>
          </table:table-cell>
          <table:table-cell office:value-type="string">
            <text:p>value</text:p>
          </table:table-cell>
        </table:table-row>
        <table:table-row>
          <table:table-cell office:value-type="string">
            <text:p>ts</text:p>
          </table:table-cell>
          <table:table-cell office:value-type="string">
            <text:p>2026-07-14T00:16Z</text:p>
          </table:table-cell>
        </table:table-row>
        <table:table-row>
          <table:table-cell office:value-type="string">
            <text:p>stack</text:p>
          </table:table-cell>
          <table:table-cell office:value-type="string">
            <text:p>C++</text:p>
          </table:table-cell>
        </table:table-row>
        <table:table-row>
          <table:table-cell office:value-type="string">
            <text:p>scripts</text:p>
          </table:table-cell>
          <table:table-cell office:value-type="string">
            <text:p>FORBIDDEN</text:p>
          </table:table-cell>
        </table:table-row>
        <table:table-row>
          <table:table-cell office:value-type="string">
            <text:p>stage</text:p>
          </table:table-cell>
          <table:table-cell office:value-type="string">
            <text:p>GLOBAL</text:p>
          </table:table-cell>
        </table:table-row>
        <table:table-row>
          <table:table-cell office:value-type="string">
            <text:p>blessing</text:p>
          </table:table-cell>
          <table:table-cell office:value-type="string">
            <text:p>God Bless</text:p>
          </table:table-cell>
        </table:table-row>
        <table:table-row>
          <table:table-cell office:value-type="string">
            <text:p>motto</text:p>
          </table:table-cell>
          <table:table-cell office:value-type="string">
            <text:p>COOKED · Field UDP fries global servers to WALL OUTLET · nothing left · no storage · no room · HATED · PISSED · God Bless</text:p>
          </table:table-cell>
        </table:table-row>
        <table:table-row>
          <table:table-cell office:value-type="string">
            <text:p>planet_defending</text:p>
          </table:table-cell>
          <table:table-cell office:value-type="string">
            <text:p>2154000</text:p>
          </table:table-cell>
        </table:table-row>
        <table:table-row>
          <table:table-cell office:value-type="string">
            <text:p>planet_areas</text:p>
          </table:table-cell>
          <table:table-cell office:value-type="string">
            <text:p>359</text:p>
          </table:table-cell>
        </table:table-row>
        <table:table-row>
          <table:table-cell office:value-type="string">
            <text:p>copilot_lifetime_rekills</text:p>
          </table:table-cell>
          <table:table-cell office:value-type="string">
            <text:p>89572</text:p>
          </table:table-cell>
        </table:table-row>
        <table:table-row>
          <table:table-cell office:value-type="string">
            <text:p>angel</text:p>
          </table:table-cell>
          <table:table-cell office:value-type="string">
            <text:p>SEALED_UP</text:p>
          </table:table-cell>
        </table:table-row>
        <table:table-row>
          <table:table-cell office:value-type="string">
            <text:p>dns</text:p>
          </table:table-cell>
          <table:table-cell office:value-type="string">
            <text:p>UP</text:p>
          </table:table-cell>
        </table:table-row>
      </table:table>
      <table:table table:name="Fleet">
        <table:table-row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zone</text:p>
          </table:table-cell>
          <table:table-cell office:value-type="string">
            <text:p>racks</text:p>
          </table:table-cell>
          <table:table-cell office:value-type="string">
            <text:p>online</text:p>
          </table:table-cell>
          <table:table-cell office:value-type="string">
            <text:p>status</text:p>
          </table:table-cell>
          <table:table-cell office:value-type="string">
            <text:p>lat</text:p>
          </table:table-cell>
          <table:table-cell office:value-type="string">
            <text:p>lon</text:p>
          </table:table-cell>
        </table:table-row>
        <table:table-row>
          <table:table-cell office:value-type="string">
            <text:p>AF</text:p>
          </table:table-cell>
          <table:table-cell office:value-type="string">
            <text:p>Afghanistan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AL</text:p>
          </table:table-cell>
          <table:table-cell office:value-type="string">
            <text:p>Albania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DZ</text:p>
          </table:table-cell>
          <table:table-cell office:value-type="string">
            <text:p>Algeria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AD</text:p>
          </table:table-cell>
          <table:table-cell office:value-type="string">
            <text:p>Andorra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AO</text:p>
          </table:table-cell>
          <table:table-cell office:value-type="string">
            <text:p>Angola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AG</text:p>
          </table:table-cell>
          <table:table-cell office:value-type="string">
            <text:p>Antigua and Barbuda</text:p>
          </table:table-cell>
          <table:table-cell office:value-type="string">
            <text:p>CARIB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AR</text:p>
          </table:table-cell>
          <table:table-cell office:value-type="string">
            <text:p>Argentina</text:p>
          </table:table-cell>
          <table:table-cell office:value-type="string">
            <text:p>S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AM</text:p>
          </table:table-cell>
          <table:table-cell office:value-type="string">
            <text:p>Armenia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AU</text:p>
          </table:table-cell>
          <table:table-cell office:value-type="string">
            <text:p>Australia</text:p>
          </table:table-cell>
          <table:table-cell office:value-type="string">
            <text:p>OC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AT</text:p>
          </table:table-cell>
          <table:table-cell office:value-type="string">
            <text:p>Austria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AZ</text:p>
          </table:table-cell>
          <table:table-cell office:value-type="string">
            <text:p>Azerbaijan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BS</text:p>
          </table:table-cell>
          <table:table-cell office:value-type="string">
            <text:p>Bahamas</text:p>
          </table:table-cell>
          <table:table-cell office:value-type="string">
            <text:p>CARIB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BH</text:p>
          </table:table-cell>
          <table:table-cell office:value-type="string">
            <text:p>Bahrain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BD</text:p>
          </table:table-cell>
          <table:table-cell office:value-type="string">
            <text:p>Bangladesh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BB</text:p>
          </table:table-cell>
          <table:table-cell office:value-type="string">
            <text:p>Barbados</text:p>
          </table:table-cell>
          <table:table-cell office:value-type="string">
            <text:p>CARIB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BY</text:p>
          </table:table-cell>
          <table:table-cell office:value-type="string">
            <text:p>Belarus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BE</text:p>
          </table:table-cell>
          <table:table-cell office:value-type="string">
            <text:p>Belgium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BZ</text:p>
          </table:table-cell>
          <table:table-cell office:value-type="string">
            <text:p>Belize</text:p>
          </table:table-cell>
          <table:table-cell office:value-type="string">
            <text:p>C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BJ</text:p>
          </table:table-cell>
          <table:table-cell office:value-type="string">
            <text:p>Benin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BT</text:p>
          </table:table-cell>
          <table:table-cell office:value-type="string">
            <text:p>Bhutan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BO</text:p>
          </table:table-cell>
          <table:table-cell office:value-type="string">
            <text:p>Bolivia</text:p>
          </table:table-cell>
          <table:table-cell office:value-type="string">
            <text:p>S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BA</text:p>
          </table:table-cell>
          <table:table-cell office:value-type="string">
            <text:p>Bosnia and Herzegovina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BW</text:p>
          </table:table-cell>
          <table:table-cell office:value-type="string">
            <text:p>Botswana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BR</text:p>
          </table:table-cell>
          <table:table-cell office:value-type="string">
            <text:p>Brazil</text:p>
          </table:table-cell>
          <table:table-cell office:value-type="string">
            <text:p>S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BN</text:p>
          </table:table-cell>
          <table:table-cell office:value-type="string">
            <text:p>Brunei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BG</text:p>
          </table:table-cell>
          <table:table-cell office:value-type="string">
            <text:p>Bulgaria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BF</text:p>
          </table:table-cell>
          <table:table-cell office:value-type="string">
            <text:p>Burkina Faso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BI</text:p>
          </table:table-cell>
          <table:table-cell office:value-type="string">
            <text:p>Burundi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CV</text:p>
          </table:table-cell>
          <table:table-cell office:value-type="string">
            <text:p>Cabo Verde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KH</text:p>
          </table:table-cell>
          <table:table-cell office:value-type="string">
            <text:p>Cambodia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CM</text:p>
          </table:table-cell>
          <table:table-cell office:value-type="string">
            <text:p>Cameroon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CA</text:p>
          </table:table-cell>
          <table:table-cell office:value-type="string">
            <text:p>Canada</text:p>
          </table:table-cell>
          <table:table-cell office:value-type="string">
            <text:p>N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CF</text:p>
          </table:table-cell>
          <table:table-cell office:value-type="string">
            <text:p>Central African Republic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TD</text:p>
          </table:table-cell>
          <table:table-cell office:value-type="string">
            <text:p>Chad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CL</text:p>
          </table:table-cell>
          <table:table-cell office:value-type="string">
            <text:p>Chile</text:p>
          </table:table-cell>
          <table:table-cell office:value-type="string">
            <text:p>S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CN</text:p>
          </table:table-cell>
          <table:table-cell office:value-type="string">
            <text:p>China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CO</text:p>
          </table:table-cell>
          <table:table-cell office:value-type="string">
            <text:p>Colombia</text:p>
          </table:table-cell>
          <table:table-cell office:value-type="string">
            <text:p>S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KM</text:p>
          </table:table-cell>
          <table:table-cell office:value-type="string">
            <text:p>Comoros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CG</text:p>
          </table:table-cell>
          <table:table-cell office:value-type="string">
            <text:p>Congo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CD</text:p>
          </table:table-cell>
          <table:table-cell office:value-type="string">
            <text:p>DR Congo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CR</text:p>
          </table:table-cell>
          <table:table-cell office:value-type="string">
            <text:p>Costa Rica</text:p>
          </table:table-cell>
          <table:table-cell office:value-type="string">
            <text:p>C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CI</text:p>
          </table:table-cell>
          <table:table-cell office:value-type="string">
            <text:p>C\u00f4te d'Ivoire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HR</text:p>
          </table:table-cell>
          <table:table-cell office:value-type="string">
            <text:p>Croatia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CU</text:p>
          </table:table-cell>
          <table:table-cell office:value-type="string">
            <text:p>Cuba</text:p>
          </table:table-cell>
          <table:table-cell office:value-type="string">
            <text:p>CARIB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CY</text:p>
          </table:table-cell>
          <table:table-cell office:value-type="string">
            <text:p>Cyprus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CZ</text:p>
          </table:table-cell>
          <table:table-cell office:value-type="string">
            <text:p>Czechia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DK</text:p>
          </table:table-cell>
          <table:table-cell office:value-type="string">
            <text:p>Denmark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DJ</text:p>
          </table:table-cell>
          <table:table-cell office:value-type="string">
            <text:p>Djibouti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DM</text:p>
          </table:table-cell>
          <table:table-cell office:value-type="string">
            <text:p>Dominica</text:p>
          </table:table-cell>
          <table:table-cell office:value-type="string">
            <text:p>CARIB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DO</text:p>
          </table:table-cell>
          <table:table-cell office:value-type="string">
            <text:p>Dominican Republic</text:p>
          </table:table-cell>
          <table:table-cell office:value-type="string">
            <text:p>CARIB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EC</text:p>
          </table:table-cell>
          <table:table-cell office:value-type="string">
            <text:p>Ecuador</text:p>
          </table:table-cell>
          <table:table-cell office:value-type="string">
            <text:p>S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EG</text:p>
          </table:table-cell>
          <table:table-cell office:value-type="string">
            <text:p>Egypt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SV</text:p>
          </table:table-cell>
          <table:table-cell office:value-type="string">
            <text:p>El Salvador</text:p>
          </table:table-cell>
          <table:table-cell office:value-type="string">
            <text:p>C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GQ</text:p>
          </table:table-cell>
          <table:table-cell office:value-type="string">
            <text:p>Equatorial Guinea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ER</text:p>
          </table:table-cell>
          <table:table-cell office:value-type="string">
            <text:p>Eritrea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EE</text:p>
          </table:table-cell>
          <table:table-cell office:value-type="string">
            <text:p>Estonia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SZ</text:p>
          </table:table-cell>
          <table:table-cell office:value-type="string">
            <text:p>Eswatini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ET</text:p>
          </table:table-cell>
          <table:table-cell office:value-type="string">
            <text:p>Ethiopia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FJ</text:p>
          </table:table-cell>
          <table:table-cell office:value-type="string">
            <text:p>Fiji</text:p>
          </table:table-cell>
          <table:table-cell office:value-type="string">
            <text:p>OC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FI</text:p>
          </table:table-cell>
          <table:table-cell office:value-type="string">
            <text:p>Finland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FR</text:p>
          </table:table-cell>
          <table:table-cell office:value-type="string">
            <text:p>France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GA</text:p>
          </table:table-cell>
          <table:table-cell office:value-type="string">
            <text:p>Gabon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GM</text:p>
          </table:table-cell>
          <table:table-cell office:value-type="string">
            <text:p>Gambia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GE</text:p>
          </table:table-cell>
          <table:table-cell office:value-type="string">
            <text:p>Georgia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DE</text:p>
          </table:table-cell>
          <table:table-cell office:value-type="string">
            <text:p>Germany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GH</text:p>
          </table:table-cell>
          <table:table-cell office:value-type="string">
            <text:p>Ghana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GR</text:p>
          </table:table-cell>
          <table:table-cell office:value-type="string">
            <text:p>Greece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GD</text:p>
          </table:table-cell>
          <table:table-cell office:value-type="string">
            <text:p>Grenada</text:p>
          </table:table-cell>
          <table:table-cell office:value-type="string">
            <text:p>CARIB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GT</text:p>
          </table:table-cell>
          <table:table-cell office:value-type="string">
            <text:p>Guatemala</text:p>
          </table:table-cell>
          <table:table-cell office:value-type="string">
            <text:p>C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GN</text:p>
          </table:table-cell>
          <table:table-cell office:value-type="string">
            <text:p>Guinea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GW</text:p>
          </table:table-cell>
          <table:table-cell office:value-type="string">
            <text:p>Guinea-Bissau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GY</text:p>
          </table:table-cell>
          <table:table-cell office:value-type="string">
            <text:p>Guyana</text:p>
          </table:table-cell>
          <table:table-cell office:value-type="string">
            <text:p>S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HT</text:p>
          </table:table-cell>
          <table:table-cell office:value-type="string">
            <text:p>Haiti</text:p>
          </table:table-cell>
          <table:table-cell office:value-type="string">
            <text:p>CARIB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HN</text:p>
          </table:table-cell>
          <table:table-cell office:value-type="string">
            <text:p>Honduras</text:p>
          </table:table-cell>
          <table:table-cell office:value-type="string">
            <text:p>C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HU</text:p>
          </table:table-cell>
          <table:table-cell office:value-type="string">
            <text:p>Hungary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IS</text:p>
          </table:table-cell>
          <table:table-cell office:value-type="string">
            <text:p>Iceland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IN</text:p>
          </table:table-cell>
          <table:table-cell office:value-type="string">
            <text:p>India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ID</text:p>
          </table:table-cell>
          <table:table-cell office:value-type="string">
            <text:p>Indonesia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IR</text:p>
          </table:table-cell>
          <table:table-cell office:value-type="string">
            <text:p>Iran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IQ</text:p>
          </table:table-cell>
          <table:table-cell office:value-type="string">
            <text:p>Iraq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IE</text:p>
          </table:table-cell>
          <table:table-cell office:value-type="string">
            <text:p>Ireland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IL</text:p>
          </table:table-cell>
          <table:table-cell office:value-type="string">
            <text:p>Israel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IT</text:p>
          </table:table-cell>
          <table:table-cell office:value-type="string">
            <text:p>Italy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JM</text:p>
          </table:table-cell>
          <table:table-cell office:value-type="string">
            <text:p>Jamaica</text:p>
          </table:table-cell>
          <table:table-cell office:value-type="string">
            <text:p>CARIB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JP</text:p>
          </table:table-cell>
          <table:table-cell office:value-type="string">
            <text:p>Japan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JO</text:p>
          </table:table-cell>
          <table:table-cell office:value-type="string">
            <text:p>Jordan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KZ</text:p>
          </table:table-cell>
          <table:table-cell office:value-type="string">
            <text:p>Kazakhstan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KE</text:p>
          </table:table-cell>
          <table:table-cell office:value-type="string">
            <text:p>Kenya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KI</text:p>
          </table:table-cell>
          <table:table-cell office:value-type="string">
            <text:p>Kiribati</text:p>
          </table:table-cell>
          <table:table-cell office:value-type="string">
            <text:p>OC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KP</text:p>
          </table:table-cell>
          <table:table-cell office:value-type="string">
            <text:p>North Korea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KR</text:p>
          </table:table-cell>
          <table:table-cell office:value-type="string">
            <text:p>South Korea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KW</text:p>
          </table:table-cell>
          <table:table-cell office:value-type="string">
            <text:p>Kuwait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KG</text:p>
          </table:table-cell>
          <table:table-cell office:value-type="string">
            <text:p>Kyrgyzstan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LA</text:p>
          </table:table-cell>
          <table:table-cell office:value-type="string">
            <text:p>Laos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LV</text:p>
          </table:table-cell>
          <table:table-cell office:value-type="string">
            <text:p>Latvia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LB</text:p>
          </table:table-cell>
          <table:table-cell office:value-type="string">
            <text:p>Lebanon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LS</text:p>
          </table:table-cell>
          <table:table-cell office:value-type="string">
            <text:p>Lesotho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LR</text:p>
          </table:table-cell>
          <table:table-cell office:value-type="string">
            <text:p>Liberia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LY</text:p>
          </table:table-cell>
          <table:table-cell office:value-type="string">
            <text:p>Libya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LI</text:p>
          </table:table-cell>
          <table:table-cell office:value-type="string">
            <text:p>Liechtenstein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LT</text:p>
          </table:table-cell>
          <table:table-cell office:value-type="string">
            <text:p>Lithuania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LU</text:p>
          </table:table-cell>
          <table:table-cell office:value-type="string">
            <text:p>Luxembourg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MG</text:p>
          </table:table-cell>
          <table:table-cell office:value-type="string">
            <text:p>Madagascar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MW</text:p>
          </table:table-cell>
          <table:table-cell office:value-type="string">
            <text:p>Malawi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MY</text:p>
          </table:table-cell>
          <table:table-cell office:value-type="string">
            <text:p>Malaysia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MV</text:p>
          </table:table-cell>
          <table:table-cell office:value-type="string">
            <text:p>Maldives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ML</text:p>
          </table:table-cell>
          <table:table-cell office:value-type="string">
            <text:p>Mali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MT</text:p>
          </table:table-cell>
          <table:table-cell office:value-type="string">
            <text:p>Malta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MH</text:p>
          </table:table-cell>
          <table:table-cell office:value-type="string">
            <text:p>Marshall Islands</text:p>
          </table:table-cell>
          <table:table-cell office:value-type="string">
            <text:p>OC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MR</text:p>
          </table:table-cell>
          <table:table-cell office:value-type="string">
            <text:p>Mauritania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MU</text:p>
          </table:table-cell>
          <table:table-cell office:value-type="string">
            <text:p>Mauritius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MX</text:p>
          </table:table-cell>
          <table:table-cell office:value-type="string">
            <text:p>Mexico</text:p>
          </table:table-cell>
          <table:table-cell office:value-type="string">
            <text:p>N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FM</text:p>
          </table:table-cell>
          <table:table-cell office:value-type="string">
            <text:p>Micronesia</text:p>
          </table:table-cell>
          <table:table-cell office:value-type="string">
            <text:p>OC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MD</text:p>
          </table:table-cell>
          <table:table-cell office:value-type="string">
            <text:p>Moldova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MC</text:p>
          </table:table-cell>
          <table:table-cell office:value-type="string">
            <text:p>Monaco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MN</text:p>
          </table:table-cell>
          <table:table-cell office:value-type="string">
            <text:p>Mongolia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ME</text:p>
          </table:table-cell>
          <table:table-cell office:value-type="string">
            <text:p>Montenegro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MA</text:p>
          </table:table-cell>
          <table:table-cell office:value-type="string">
            <text:p>Morocco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MZ</text:p>
          </table:table-cell>
          <table:table-cell office:value-type="string">
            <text:p>Mozambique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MM</text:p>
          </table:table-cell>
          <table:table-cell office:value-type="string">
            <text:p>Myanmar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NA</text:p>
          </table:table-cell>
          <table:table-cell office:value-type="string">
            <text:p>Namibia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NR</text:p>
          </table:table-cell>
          <table:table-cell office:value-type="string">
            <text:p>Nauru</text:p>
          </table:table-cell>
          <table:table-cell office:value-type="string">
            <text:p>OC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NP</text:p>
          </table:table-cell>
          <table:table-cell office:value-type="string">
            <text:p>Nepal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NL</text:p>
          </table:table-cell>
          <table:table-cell office:value-type="string">
            <text:p>Netherlands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NZ</text:p>
          </table:table-cell>
          <table:table-cell office:value-type="string">
            <text:p>New Zealand</text:p>
          </table:table-cell>
          <table:table-cell office:value-type="string">
            <text:p>OC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NI</text:p>
          </table:table-cell>
          <table:table-cell office:value-type="string">
            <text:p>Nicaragua</text:p>
          </table:table-cell>
          <table:table-cell office:value-type="string">
            <text:p>C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NE</text:p>
          </table:table-cell>
          <table:table-cell office:value-type="string">
            <text:p>Niger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NG</text:p>
          </table:table-cell>
          <table:table-cell office:value-type="string">
            <text:p>Nigeria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MK</text:p>
          </table:table-cell>
          <table:table-cell office:value-type="string">
            <text:p>North Macedonia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NO</text:p>
          </table:table-cell>
          <table:table-cell office:value-type="string">
            <text:p>Norway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OM</text:p>
          </table:table-cell>
          <table:table-cell office:value-type="string">
            <text:p>Oman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PK</text:p>
          </table:table-cell>
          <table:table-cell office:value-type="string">
            <text:p>Pakistan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PW</text:p>
          </table:table-cell>
          <table:table-cell office:value-type="string">
            <text:p>Palau</text:p>
          </table:table-cell>
          <table:table-cell office:value-type="string">
            <text:p>OC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PS</text:p>
          </table:table-cell>
          <table:table-cell office:value-type="string">
            <text:p>Palestine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PA</text:p>
          </table:table-cell>
          <table:table-cell office:value-type="string">
            <text:p>Panama</text:p>
          </table:table-cell>
          <table:table-cell office:value-type="string">
            <text:p>C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PG</text:p>
          </table:table-cell>
          <table:table-cell office:value-type="string">
            <text:p>Papua New Guinea</text:p>
          </table:table-cell>
          <table:table-cell office:value-type="string">
            <text:p>OC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PY</text:p>
          </table:table-cell>
          <table:table-cell office:value-type="string">
            <text:p>Paraguay</text:p>
          </table:table-cell>
          <table:table-cell office:value-type="string">
            <text:p>S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PE</text:p>
          </table:table-cell>
          <table:table-cell office:value-type="string">
            <text:p>Peru</text:p>
          </table:table-cell>
          <table:table-cell office:value-type="string">
            <text:p>S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PH</text:p>
          </table:table-cell>
          <table:table-cell office:value-type="string">
            <text:p>Philippines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PL</text:p>
          </table:table-cell>
          <table:table-cell office:value-type="string">
            <text:p>Poland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PT</text:p>
          </table:table-cell>
          <table:table-cell office:value-type="string">
            <text:p>Portugal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QA</text:p>
          </table:table-cell>
          <table:table-cell office:value-type="string">
            <text:p>Qatar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RO</text:p>
          </table:table-cell>
          <table:table-cell office:value-type="string">
            <text:p>Romania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RU</text:p>
          </table:table-cell>
          <table:table-cell office:value-type="string">
            <text:p>Russia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RW</text:p>
          </table:table-cell>
          <table:table-cell office:value-type="string">
            <text:p>Rwanda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KN</text:p>
          </table:table-cell>
          <table:table-cell office:value-type="string">
            <text:p>Saint Kitts and Nevis</text:p>
          </table:table-cell>
          <table:table-cell office:value-type="string">
            <text:p>CARIB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LC</text:p>
          </table:table-cell>
          <table:table-cell office:value-type="string">
            <text:p>Saint Lucia</text:p>
          </table:table-cell>
          <table:table-cell office:value-type="string">
            <text:p>CARIB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VC</text:p>
          </table:table-cell>
          <table:table-cell office:value-type="string">
            <text:p>Saint Vincent and the Grenadines</text:p>
          </table:table-cell>
          <table:table-cell office:value-type="string">
            <text:p>CARIB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WS</text:p>
          </table:table-cell>
          <table:table-cell office:value-type="string">
            <text:p>Samoa</text:p>
          </table:table-cell>
          <table:table-cell office:value-type="string">
            <text:p>OC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SM</text:p>
          </table:table-cell>
          <table:table-cell office:value-type="string">
            <text:p>San Marino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ST</text:p>
          </table:table-cell>
          <table:table-cell office:value-type="string">
            <text:p>Sao Tome and Principe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SA</text:p>
          </table:table-cell>
          <table:table-cell office:value-type="string">
            <text:p>Saudi Arabia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SN</text:p>
          </table:table-cell>
          <table:table-cell office:value-type="string">
            <text:p>Senegal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RS</text:p>
          </table:table-cell>
          <table:table-cell office:value-type="string">
            <text:p>Serbia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SC</text:p>
          </table:table-cell>
          <table:table-cell office:value-type="string">
            <text:p>Seychelles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SL</text:p>
          </table:table-cell>
          <table:table-cell office:value-type="string">
            <text:p>Sierra Leone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SG</text:p>
          </table:table-cell>
          <table:table-cell office:value-type="string">
            <text:p>Singapore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SK</text:p>
          </table:table-cell>
          <table:table-cell office:value-type="string">
            <text:p>Slovakia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SI</text:p>
          </table:table-cell>
          <table:table-cell office:value-type="string">
            <text:p>Slovenia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SB</text:p>
          </table:table-cell>
          <table:table-cell office:value-type="string">
            <text:p>Solomon Islands</text:p>
          </table:table-cell>
          <table:table-cell office:value-type="string">
            <text:p>OC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SO</text:p>
          </table:table-cell>
          <table:table-cell office:value-type="string">
            <text:p>Somalia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SS</text:p>
          </table:table-cell>
          <table:table-cell office:value-type="string">
            <text:p>South Sudan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ES</text:p>
          </table:table-cell>
          <table:table-cell office:value-type="string">
            <text:p>Spain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LK</text:p>
          </table:table-cell>
          <table:table-cell office:value-type="string">
            <text:p>Sri Lanka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SD</text:p>
          </table:table-cell>
          <table:table-cell office:value-type="string">
            <text:p>Sudan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SR</text:p>
          </table:table-cell>
          <table:table-cell office:value-type="string">
            <text:p>Suriname</text:p>
          </table:table-cell>
          <table:table-cell office:value-type="string">
            <text:p>S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SE</text:p>
          </table:table-cell>
          <table:table-cell office:value-type="string">
            <text:p>Sweden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CH</text:p>
          </table:table-cell>
          <table:table-cell office:value-type="string">
            <text:p>Switzerland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SY</text:p>
          </table:table-cell>
          <table:table-cell office:value-type="string">
            <text:p>Syria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TW</text:p>
          </table:table-cell>
          <table:table-cell office:value-type="string">
            <text:p>Taiwan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TJ</text:p>
          </table:table-cell>
          <table:table-cell office:value-type="string">
            <text:p>Tajikistan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TZ</text:p>
          </table:table-cell>
          <table:table-cell office:value-type="string">
            <text:p>Tanzania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TH</text:p>
          </table:table-cell>
          <table:table-cell office:value-type="string">
            <text:p>Thailand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TL</text:p>
          </table:table-cell>
          <table:table-cell office:value-type="string">
            <text:p>Timor-Leste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TG</text:p>
          </table:table-cell>
          <table:table-cell office:value-type="string">
            <text:p>Togo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TO</text:p>
          </table:table-cell>
          <table:table-cell office:value-type="string">
            <text:p>Tonga</text:p>
          </table:table-cell>
          <table:table-cell office:value-type="string">
            <text:p>OC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TT</text:p>
          </table:table-cell>
          <table:table-cell office:value-type="string">
            <text:p>Trinidad and Tobago</text:p>
          </table:table-cell>
          <table:table-cell office:value-type="string">
            <text:p>CARIB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TN</text:p>
          </table:table-cell>
          <table:table-cell office:value-type="string">
            <text:p>Tunisia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TR</text:p>
          </table:table-cell>
          <table:table-cell office:value-type="string">
            <text:p>T\u00fcrkiye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TM</text:p>
          </table:table-cell>
          <table:table-cell office:value-type="string">
            <text:p>Turkmenistan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TV</text:p>
          </table:table-cell>
          <table:table-cell office:value-type="string">
            <text:p>Tuvalu</text:p>
          </table:table-cell>
          <table:table-cell office:value-type="string">
            <text:p>OC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UG</text:p>
          </table:table-cell>
          <table:table-cell office:value-type="string">
            <text:p>Uganda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UA</text:p>
          </table:table-cell>
          <table:table-cell office:value-type="string">
            <text:p>Ukraine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AE</text:p>
          </table:table-cell>
          <table:table-cell office:value-type="string">
            <text:p>United Arab Emirates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GB</text:p>
          </table:table-cell>
          <table:table-cell office:value-type="string">
            <text:p>United Kingdom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US</text:p>
          </table:table-cell>
          <table:table-cell office:value-type="string">
            <text:p>United States</text:p>
          </table:table-cell>
          <table:table-cell office:value-type="string">
            <text:p>N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UY</text:p>
          </table:table-cell>
          <table:table-cell office:value-type="string">
            <text:p>Uruguay</text:p>
          </table:table-cell>
          <table:table-cell office:value-type="string">
            <text:p>S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UZ</text:p>
          </table:table-cell>
          <table:table-cell office:value-type="string">
            <text:p>Uzbekistan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VU</text:p>
          </table:table-cell>
          <table:table-cell office:value-type="string">
            <text:p>Vanuatu</text:p>
          </table:table-cell>
          <table:table-cell office:value-type="string">
            <text:p>OC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VA</text:p>
          </table:table-cell>
          <table:table-cell office:value-type="string">
            <text:p>Vatican City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VE</text:p>
          </table:table-cell>
          <table:table-cell office:value-type="string">
            <text:p>Venezuela</text:p>
          </table:table-cell>
          <table:table-cell office:value-type="string">
            <text:p>S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VN</text:p>
          </table:table-cell>
          <table:table-cell office:value-type="string">
            <text:p>Vietnam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YE</text:p>
          </table:table-cell>
          <table:table-cell office:value-type="string">
            <text:p>Yemen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ZM</text:p>
          </table:table-cell>
          <table:table-cell office:value-type="string">
            <text:p>Zambia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ZW</text:p>
          </table:table-cell>
          <table:table-cell office:value-type="string">
            <text:p>Zimbabwe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DC</text:p>
          </table:table-cell>
          <table:table-cell office:value-type="string">
            <text:p>District of Columbia</text:p>
          </table:table-cell>
          <table:table-cell office:value-type="string">
            <text:p>N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PR</text:p>
          </table:table-cell>
          <table:table-cell office:value-type="string">
            <text:p>Puerto Rico</text:p>
          </table:table-cell>
          <table:table-cell office:value-type="string">
            <text:p>CARIB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GU</text:p>
          </table:table-cell>
          <table:table-cell office:value-type="string">
            <text:p>Guam</text:p>
          </table:table-cell>
          <table:table-cell office:value-type="string">
            <text:p>OC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VI</text:p>
          </table:table-cell>
          <table:table-cell office:value-type="string">
            <text:p>U.S. Virgin Islands</text:p>
          </table:table-cell>
          <table:table-cell office:value-type="string">
            <text:p>CARIB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AS</text:p>
          </table:table-cell>
          <table:table-cell office:value-type="string">
            <text:p>American Samoa</text:p>
          </table:table-cell>
          <table:table-cell office:value-type="string">
            <text:p>OC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MP</text:p>
          </table:table-cell>
          <table:table-cell office:value-type="string">
            <text:p>Northern Mariana Islands</text:p>
          </table:table-cell>
          <table:table-cell office:value-type="string">
            <text:p>OC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UP</text:p>
          </table:table-cell>
          <table:table-cell office:value-type="string">
            <text:p>Michigan Upper Peninsula</text:p>
          </table:table-cell>
          <table:table-cell office:value-type="string">
            <text:p>N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GL</text:p>
          </table:table-cell>
          <table:table-cell office:value-type="string">
            <text:p>Greenland</text:p>
          </table:table-cell>
          <table:table-cell office:value-type="string">
            <text:p>N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HK</text:p>
          </table:table-cell>
          <table:table-cell office:value-type="string">
            <text:p>Hong Kong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MO</text:p>
          </table:table-cell>
          <table:table-cell office:value-type="string">
            <text:p>Macao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XK</text:p>
          </table:table-cell>
          <table:table-cell office:value-type="string">
            <text:p>Kosovo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MOW</text:p>
          </table:table-cell>
          <table:table-cell office:value-type="string">
            <text:p>Moscow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LED</text:p>
          </table:table-cell>
          <table:table-cell office:value-type="string">
            <text:p>Saint Petersburg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OVB</text:p>
          </table:table-cell>
          <table:table-cell office:value-type="string">
            <text:p>Novosibirsk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VVO</text:p>
          </table:table-cell>
          <table:table-cell office:value-type="string">
            <text:p>Vladivostok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IEV</text:p>
          </table:table-cell>
          <table:table-cell office:value-type="string">
            <text:p>Kyiv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LWO</text:p>
          </table:table-cell>
          <table:table-cell office:value-type="string">
            <text:p>Lviv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ODS</text:p>
          </table:table-cell>
          <table:table-cell office:value-type="string">
            <text:p>Odesa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HRK</text:p>
          </table:table-cell>
          <table:table-cell office:value-type="string">
            <text:p>Kharkiv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TLV</text:p>
          </table:table-cell>
          <table:table-cell office:value-type="string">
            <text:p>Tel Aviv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JRS</text:p>
          </table:table-cell>
          <table:table-cell office:value-type="string">
            <text:p>Jerusalem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HFA</text:p>
          </table:table-cell>
          <table:table-cell office:value-type="string">
            <text:p>Haifa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THR</text:p>
          </table:table-cell>
          <table:table-cell office:value-type="string">
            <text:p>Tehran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IFN</text:p>
          </table:table-cell>
          <table:table-cell office:value-type="string">
            <text:p>Isfahan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MHD</text:p>
          </table:table-cell>
          <table:table-cell office:value-type="string">
            <text:p>Mashhad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WAW</text:p>
          </table:table-cell>
          <table:table-cell office:value-type="string">
            <text:p>Warsaw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KRK</text:p>
          </table:table-cell>
          <table:table-cell office:value-type="string">
            <text:p>Krakow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GDN</text:p>
          </table:table-cell>
          <table:table-cell office:value-type="string">
            <text:p>Gdansk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TPE</text:p>
          </table:table-cell>
          <table:table-cell office:value-type="string">
            <text:p>Taipei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KHH</text:p>
          </table:table-cell>
          <table:table-cell office:value-type="string">
            <text:p>Kaohsiung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TXG</text:p>
          </table:table-cell>
          <table:table-cell office:value-type="string">
            <text:p>Taichung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HAN</text:p>
          </table:table-cell>
          <table:table-cell office:value-type="string">
            <text:p>Hanoi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SGN</text:p>
          </table:table-cell>
          <table:table-cell office:value-type="string">
            <text:p>Ho Chi Minh City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DAD</text:p>
          </table:table-cell>
          <table:table-cell office:value-type="string">
            <text:p>Da Nang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MNL</text:p>
          </table:table-cell>
          <table:table-cell office:value-type="string">
            <text:p>Manila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CEB</text:p>
          </table:table-cell>
          <table:table-cell office:value-type="string">
            <text:p>Cebu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DVO</text:p>
          </table:table-cell>
          <table:table-cell office:value-type="string">
            <text:p>Davao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NYC</text:p>
          </table:table-cell>
          <table:table-cell office:value-type="string">
            <text:p>New York City</text:p>
          </table:table-cell>
          <table:table-cell office:value-type="string">
            <text:p>N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LAX</text:p>
          </table:table-cell>
          <table:table-cell office:value-type="string">
            <text:p>Los Angeles</text:p>
          </table:table-cell>
          <table:table-cell office:value-type="string">
            <text:p>N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CHI</text:p>
          </table:table-cell>
          <table:table-cell office:value-type="string">
            <text:p>Chicago</text:p>
          </table:table-cell>
          <table:table-cell office:value-type="string">
            <text:p>N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LON</text:p>
          </table:table-cell>
          <table:table-cell office:value-type="string">
            <text:p>London City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PAR</text:p>
          </table:table-cell>
          <table:table-cell office:value-type="string">
            <text:p>Paris City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BER</text:p>
          </table:table-cell>
          <table:table-cell office:value-type="string">
            <text:p>Berlin City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TYO</text:p>
          </table:table-cell>
          <table:table-cell office:value-type="string">
            <text:p>Tokyo City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SHA</text:p>
          </table:table-cell>
          <table:table-cell office:value-type="string">
            <text:p>Shanghai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PEK</text:p>
          </table:table-cell>
          <table:table-cell office:value-type="string">
            <text:p>Beijing City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DEL</text:p>
          </table:table-cell>
          <table:table-cell office:value-type="string">
            <text:p>Delhi City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BOM</text:p>
          </table:table-cell>
          <table:table-cell office:value-type="string">
            <text:p>Mumbai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SYD</text:p>
          </table:table-cell>
          <table:table-cell office:value-type="string">
            <text:p>Sydney</text:p>
          </table:table-cell>
          <table:table-cell office:value-type="string">
            <text:p>OC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SAO</text:p>
          </table:table-cell>
          <table:table-cell office:value-type="string">
            <text:p>Sao Paulo</text:p>
          </table:table-cell>
          <table:table-cell office:value-type="string">
            <text:p>S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MEX</text:p>
          </table:table-cell>
          <table:table-cell office:value-type="string">
            <text:p>Mexico City Metro</text:p>
          </table:table-cell>
          <table:table-cell office:value-type="string">
            <text:p>N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CAI</text:p>
          </table:table-cell>
          <table:table-cell office:value-type="string">
            <text:p>Cairo City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JNB</text:p>
          </table:table-cell>
          <table:table-cell office:value-type="string">
            <text:p>Johannesburg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LAG</text:p>
          </table:table-cell>
          <table:table-cell office:value-type="string">
            <text:p>Lagos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IST</text:p>
          </table:table-cell>
          <table:table-cell office:value-type="string">
            <text:p>Istanbul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DXB</text:p>
          </table:table-cell>
          <table:table-cell office:value-type="string">
            <text:p>Dubai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SIN</text:p>
          </table:table-cell>
          <table:table-cell office:value-type="string">
            <text:p>Singapore City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SEL</text:p>
          </table:table-cell>
          <table:table-cell office:value-type="string">
            <text:p>Seoul City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BKK</text:p>
          </table:table-cell>
          <table:table-cell office:value-type="string">
            <text:p>Bangkok City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HAV</text:p>
          </table:table-cell>
          <table:table-cell office:value-type="string">
            <text:p>Havana City</text:p>
          </table:table-cell>
          <table:table-cell office:value-type="string">
            <text:p>CARIB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KGD</text:p>
          </table:table-cell>
          <table:table-cell office:value-type="string">
            <text:p>Kaliningrad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SVX</text:p>
          </table:table-cell>
          <table:table-cell office:value-type="string">
            <text:p>Yekaterinburg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KJA</text:p>
          </table:table-cell>
          <table:table-cell office:value-type="string">
            <text:p>Krasnoyarsk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ROV</text:p>
          </table:table-cell>
          <table:table-cell office:value-type="string">
            <text:p>Rostov-on-Don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DNK</text:p>
          </table:table-cell>
          <table:table-cell office:value-type="string">
            <text:p>Dnipro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VIN</text:p>
          </table:table-cell>
          <table:table-cell office:value-type="string">
            <text:p>Vinnytsia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ZPR</text:p>
          </table:table-cell>
          <table:table-cell office:value-type="string">
            <text:p>Zaporizhzhia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BEY</text:p>
          </table:table-cell>
          <table:table-cell office:value-type="string">
            <text:p>Beirut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AMM</text:p>
          </table:table-cell>
          <table:table-cell office:value-type="string">
            <text:p>Amman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DAM</text:p>
          </table:table-cell>
          <table:table-cell office:value-type="string">
            <text:p>Damascus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BGW</text:p>
          </table:table-cell>
          <table:table-cell office:value-type="string">
            <text:p>Baghdad City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DOH</text:p>
          </table:table-cell>
          <table:table-cell office:value-type="string">
            <text:p>Doha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RUH</text:p>
          </table:table-cell>
          <table:table-cell office:value-type="string">
            <text:p>Riyadh City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JED</text:p>
          </table:table-cell>
          <table:table-cell office:value-type="string">
            <text:p>Jeddah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KHI</text:p>
          </table:table-cell>
          <table:table-cell office:value-type="string">
            <text:p>Karachi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LHE</text:p>
          </table:table-cell>
          <table:table-cell office:value-type="string">
            <text:p>Lahore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DAC</text:p>
          </table:table-cell>
          <table:table-cell office:value-type="string">
            <text:p>Dhaka City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CCU</text:p>
          </table:table-cell>
          <table:table-cell office:value-type="string">
            <text:p>Kolkata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BLR</text:p>
          </table:table-cell>
          <table:table-cell office:value-type="string">
            <text:p>Bengaluru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MAA</text:p>
          </table:table-cell>
          <table:table-cell office:value-type="string">
            <text:p>Chennai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CGK</text:p>
          </table:table-cell>
          <table:table-cell office:value-type="string">
            <text:p>Jakarta City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SUB</text:p>
          </table:table-cell>
          <table:table-cell office:value-type="string">
            <text:p>Surabaya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QZN</text:p>
          </table:table-cell>
          <table:table-cell office:value-type="string">
            <text:p>Quezon City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MCT</text:p>
          </table:table-cell>
          <table:table-cell office:value-type="string">
            <text:p>Mactan Cebu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PQC</text:p>
          </table:table-cell>
          <table:table-cell office:value-type="string">
            <text:p>Phu Quoc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HUI</text:p>
          </table:table-cell>
          <table:table-cell office:value-type="string">
            <text:p>Hue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NRT</text:p>
          </table:table-cell>
          <table:table-cell office:value-type="string">
            <text:p>Narita Corridor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OSA</text:p>
          </table:table-cell>
          <table:table-cell office:value-type="string">
            <text:p>Osaka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FUK</text:p>
          </table:table-cell>
          <table:table-cell office:value-type="string">
            <text:p>Fukuoka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ICN</text:p>
          </table:table-cell>
          <table:table-cell office:value-type="string">
            <text:p>Incheon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PUS</text:p>
          </table:table-cell>
          <table:table-cell office:value-type="string">
            <text:p>Busan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TNN</text:p>
          </table:table-cell>
          <table:table-cell office:value-type="string">
            <text:p>Tainan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HNL</text:p>
          </table:table-cell>
          <table:table-cell office:value-type="string">
            <text:p>Honolulu</text:p>
          </table:table-cell>
          <table:table-cell office:value-type="string">
            <text:p>OC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ANC</text:p>
          </table:table-cell>
          <table:table-cell office:value-type="string">
            <text:p>Anchorage</text:p>
          </table:table-cell>
          <table:table-cell office:value-type="string">
            <text:p>N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YVR</text:p>
          </table:table-cell>
          <table:table-cell office:value-type="string">
            <text:p>Vancouver</text:p>
          </table:table-cell>
          <table:table-cell office:value-type="string">
            <text:p>N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YYZ</text:p>
          </table:table-cell>
          <table:table-cell office:value-type="string">
            <text:p>Toronto</text:p>
          </table:table-cell>
          <table:table-cell office:value-type="string">
            <text:p>N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YUL</text:p>
          </table:table-cell>
          <table:table-cell office:value-type="string">
            <text:p>Montreal</text:p>
          </table:table-cell>
          <table:table-cell office:value-type="string">
            <text:p>N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MIA</text:p>
          </table:table-cell>
          <table:table-cell office:value-type="string">
            <text:p>Miami</text:p>
          </table:table-cell>
          <table:table-cell office:value-type="string">
            <text:p>N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SEA</text:p>
          </table:table-cell>
          <table:table-cell office:value-type="string">
            <text:p>Seattle</text:p>
          </table:table-cell>
          <table:table-cell office:value-type="string">
            <text:p>N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DEN</text:p>
          </table:table-cell>
          <table:table-cell office:value-type="string">
            <text:p>Denver</text:p>
          </table:table-cell>
          <table:table-cell office:value-type="string">
            <text:p>N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ATL</text:p>
          </table:table-cell>
          <table:table-cell office:value-type="string">
            <text:p>Atlanta</text:p>
          </table:table-cell>
          <table:table-cell office:value-type="string">
            <text:p>N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DFW</text:p>
          </table:table-cell>
          <table:table-cell office:value-type="string">
            <text:p>Dallas</text:p>
          </table:table-cell>
          <table:table-cell office:value-type="string">
            <text:p>N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BOG</text:p>
          </table:table-cell>
          <table:table-cell office:value-type="string">
            <text:p>Bogota City</text:p>
          </table:table-cell>
          <table:table-cell office:value-type="string">
            <text:p>S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LIM</text:p>
          </table:table-cell>
          <table:table-cell office:value-type="string">
            <text:p>Lima City</text:p>
          </table:table-cell>
          <table:table-cell office:value-type="string">
            <text:p>S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SCL</text:p>
          </table:table-cell>
          <table:table-cell office:value-type="string">
            <text:p>Santiago City</text:p>
          </table:table-cell>
          <table:table-cell office:value-type="string">
            <text:p>S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EZE</text:p>
          </table:table-cell>
          <table:table-cell office:value-type="string">
            <text:p>Buenos Aires City</text:p>
          </table:table-cell>
          <table:table-cell office:value-type="string">
            <text:p>S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GIG</text:p>
          </table:table-cell>
          <table:table-cell office:value-type="string">
            <text:p>Rio de Janeiro</text:p>
          </table:table-cell>
          <table:table-cell office:value-type="string">
            <text:p>S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CPT</text:p>
          </table:table-cell>
          <table:table-cell office:value-type="string">
            <text:p>Cape Town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NBO</text:p>
          </table:table-cell>
          <table:table-cell office:value-type="string">
            <text:p>Nairobi City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ACC</text:p>
          </table:table-cell>
          <table:table-cell office:value-type="string">
            <text:p>Accra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ADD</text:p>
          </table:table-cell>
          <table:table-cell office:value-type="string">
            <text:p>Addis Ababa City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CAS</text:p>
          </table:table-cell>
          <table:table-cell office:value-type="string">
            <text:p>Casablanca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ALG</text:p>
          </table:table-cell>
          <table:table-cell office:value-type="string">
            <text:p>Algiers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TUN</text:p>
          </table:table-cell>
          <table:table-cell office:value-type="string">
            <text:p>Tunis</text:p>
          </table:table-cell>
          <table:table-cell office:value-type="string">
            <text:p>AF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ATH</text:p>
          </table:table-cell>
          <table:table-cell office:value-type="string">
            <text:p>Athens City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MAD</text:p>
          </table:table-cell>
          <table:table-cell office:value-type="string">
            <text:p>Madrid City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BCN</text:p>
          </table:table-cell>
          <table:table-cell office:value-type="string">
            <text:p>Barcelona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ROM</text:p>
          </table:table-cell>
          <table:table-cell office:value-type="string">
            <text:p>Rome City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MIL</text:p>
          </table:table-cell>
          <table:table-cell office:value-type="string">
            <text:p>Milan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VIE</text:p>
          </table:table-cell>
          <table:table-cell office:value-type="string">
            <text:p>Vienna City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PRG</text:p>
          </table:table-cell>
          <table:table-cell office:value-type="string">
            <text:p>Prague City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LOD</text:p>
          </table:table-cell>
          <table:table-cell office:value-type="string">
            <text:p>Lodz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WRO</text:p>
          </table:table-cell>
          <table:table-cell office:value-type="string">
            <text:p>Wroclaw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HEL</text:p>
          </table:table-cell>
          <table:table-cell office:value-type="string">
            <text:p>Helsinki City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STO</text:p>
          </table:table-cell>
          <table:table-cell office:value-type="string">
            <text:p>Stockholm City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OSL</text:p>
          </table:table-cell>
          <table:table-cell office:value-type="string">
            <text:p>Oslo City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REK</text:p>
          </table:table-cell>
          <table:table-cell office:value-type="string">
            <text:p>Reykjavik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TLL</text:p>
          </table:table-cell>
          <table:table-cell office:value-type="string">
            <text:p>Tallinn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RIX</text:p>
          </table:table-cell>
          <table:table-cell office:value-type="string">
            <text:p>Riga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VNO</text:p>
          </table:table-cell>
          <table:table-cell office:value-type="string">
            <text:p>Vilnius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KIV</text:p>
          </table:table-cell>
          <table:table-cell office:value-type="string">
            <text:p>Chisinau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TBS</text:p>
          </table:table-cell>
          <table:table-cell office:value-type="string">
            <text:p>Tbilisi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EVN</text:p>
          </table:table-cell>
          <table:table-cell office:value-type="string">
            <text:p>Yerevan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BAK</text:p>
          </table:table-cell>
          <table:table-cell office:value-type="string">
            <text:p>Baku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ALA</text:p>
          </table:table-cell>
          <table:table-cell office:value-type="string">
            <text:p>Almaty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TAS</text:p>
          </table:table-cell>
          <table:table-cell office:value-type="string">
            <text:p>Tashkent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ULN</text:p>
          </table:table-cell>
          <table:table-cell office:value-type="string">
            <text:p>Ulaanbaatar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PNH</text:p>
          </table:table-cell>
          <table:table-cell office:value-type="string">
            <text:p>Phnom Penh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RGN</text:p>
          </table:table-cell>
          <table:table-cell office:value-type="string">
            <text:p>Yangon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VTE</text:p>
          </table:table-cell>
          <table:table-cell office:value-type="string">
            <text:p>Vientiane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CMB</text:p>
          </table:table-cell>
          <table:table-cell office:value-type="string">
            <text:p>Colombo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KTM</text:p>
          </table:table-cell>
          <table:table-cell office:value-type="string">
            <text:p>Kathmandu</text:p>
          </table:table-cell>
          <table:table-cell office:value-type="string">
            <text:p>AS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MEL</text:p>
          </table:table-cell>
          <table:table-cell office:value-type="string">
            <text:p>Melbourne</text:p>
          </table:table-cell>
          <table:table-cell office:value-type="string">
            <text:p>OC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AKL</text:p>
          </table:table-cell>
          <table:table-cell office:value-type="string">
            <text:p>Auckland</text:p>
          </table:table-cell>
          <table:table-cell office:value-type="string">
            <text:p>OC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PPT</text:p>
          </table:table-cell>
          <table:table-cell office:value-type="string">
            <text:p>Papeete</text:p>
          </table:table-cell>
          <table:table-cell office:value-type="string">
            <text:p>OC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GUM</text:p>
          </table:table-cell>
          <table:table-cell office:value-type="string">
            <text:p>Hagatna Guam</text:p>
          </table:table-cell>
          <table:table-cell office:value-type="string">
            <text:p>OC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SPN</text:p>
          </table:table-cell>
          <table:table-cell office:value-type="string">
            <text:p>Saipan City</text:p>
          </table:table-cell>
          <table:table-cell office:value-type="string">
            <text:p>OC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SJU</text:p>
          </table:table-cell>
          <table:table-cell office:value-type="string">
            <text:p>San Juan PR</text:p>
          </table:table-cell>
          <table:table-cell office:value-type="string">
            <text:p>CARIB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POS</text:p>
          </table:table-cell>
          <table:table-cell office:value-type="string">
            <text:p>Port of Spain</text:p>
          </table:table-cell>
          <table:table-cell office:value-type="string">
            <text:p>CARIB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KIN</text:p>
          </table:table-cell>
          <table:table-cell office:value-type="string">
            <text:p>Kingston JM</text:p>
          </table:table-cell>
          <table:table-cell office:value-type="string">
            <text:p>CARIB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PAP</text:p>
          </table:table-cell>
          <table:table-cell office:value-type="string">
            <text:p>Port-au-Prince</text:p>
          </table:table-cell>
          <table:table-cell office:value-type="string">
            <text:p>CARIB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SCU</text:p>
          </table:table-cell>
          <table:table-cell office:value-type="string">
            <text:p>Santiago de Cuba</text:p>
          </table:table-cell>
          <table:table-cell office:value-type="string">
            <text:p>CARIB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NUK</text:p>
          </table:table-cell>
          <table:table-cell office:value-type="string">
            <text:p>Nuuk</text:p>
          </table:table-cell>
          <table:table-cell office:value-type="string">
            <text:p>N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FAI</text:p>
          </table:table-cell>
          <table:table-cell office:value-type="string">
            <text:p>Fairbanks</text:p>
          </table:table-cell>
          <table:table-cell office:value-type="string">
            <text:p>N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YFB</text:p>
          </table:table-cell>
          <table:table-cell office:value-type="string">
            <text:p>Iqaluit</text:p>
          </table:table-cell>
          <table:table-cell office:value-type="string">
            <text:p>N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TRD</text:p>
          </table:table-cell>
          <table:table-cell office:value-type="string">
            <text:p>Tromso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LYR</text:p>
          </table:table-cell>
          <table:table-cell office:value-type="string">
            <text:p>Longyearbyen</text:p>
          </table:table-cell>
          <table:table-cell office:value-type="string">
            <text:p>EU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USH</text:p>
          </table:table-cell>
          <table:table-cell office:value-type="string">
            <text:p>Ushuaia</text:p>
          </table:table-cell>
          <table:table-cell office:value-type="string">
            <text:p>S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PMC</text:p>
          </table:table-cell>
          <table:table-cell office:value-type="string">
            <text:p>Puerto Montt</text:p>
          </table:table-cell>
          <table:table-cell office:value-type="string">
            <text:p>S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MQT</text:p>
          </table:table-cell>
          <table:table-cell office:value-type="string">
            <text:p>Marquette UP</text:p>
          </table:table-cell>
          <table:table-cell office:value-type="string">
            <text:p>N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ESC</text:p>
          </table:table-cell>
          <table:table-cell office:value-type="string">
            <text:p>Escanaba</text:p>
          </table:table-cell>
          <table:table-cell office:value-type="string">
            <text:p>N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GRB</text:p>
          </table:table-cell>
          <table:table-cell office:value-type="string">
            <text:p>Green Bay</text:p>
          </table:table-cell>
          <table:table-cell office:value-type="string">
            <text:p>N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  <table:table-row>
          <table:table-cell office:value-type="string">
            <text:p>MSN</text:p>
          </table:table-cell>
          <table:table-cell office:value-type="string">
            <text:p>Madison WI</text:p>
          </table:table-cell>
          <table:table-cell office:value-type="string">
            <text:p>NA</text:p>
          </table:table-cell>
          <table:table-cell office:value-type="string">
            <text:p>6000</text:p>
          </table:table-cell>
          <table:table-cell office:value-type="string">
            <text:p>6000</text:p>
          </table:table-cell>
          <table:table-cell office:value-type="string">
            <text:p>ok</text:p>
          </table:table-cell>
          <table:table-cell office:value-type="string">
            <text:p>lon</text:p>
          </table:table-cell>
          <table:table-cell office:value-type="string">
            <text:p>online</text:p>
          </table:table-cell>
        </table:table-row>
      </table:table>
      <table:table table:name="Threats">
        <table:table-row>
          <table:table-cell office:value-type="string">
            <text:p>id</text:p>
          </table:table-cell>
          <table:table-cell office:value-type="string">
            <text:p>label</text:p>
          </table:table-cell>
          <table:table-cell office:value-type="string">
            <text:p>status</text:p>
          </table:table-cell>
          <table:table-cell office:value-type="string">
            <text:p>severity</text:p>
          </table:table-cell>
          <table:table-cell office:value-type="string">
            <text:p>vector</text:p>
          </table:table-cell>
          <table:table-cell office:value-type="string">
            <text:p>detail</text:p>
          </table:table-cell>
        </table:table-row>
      </table:table>
      <table:table table:name="Kills">
        <table:table-row>
          <table:table-cell office:value-type="string">
            <text:p>id</text:p>
          </table:table-cell>
          <table:table-cell office:value-type="string">
            <text:p>target</text:p>
          </table:table-cell>
          <table:table-cell office:value-type="string">
            <text:p>status</text:p>
          </table:table-cell>
          <table:table-cell office:value-type="string">
            <text:p>severity</text:p>
          </table:table-cell>
          <table:table-cell office:value-type="string">
            <text:p>vector</text:p>
          </table:table-cell>
          <table:table-cell office:value-type="string">
            <text:p>lat</text:p>
          </table:table-cell>
          <table:table-cell office:value-type="string">
            <text:p>lon</text:p>
          </table:table-cell>
          <table:table-cell office:value-type="string">
            <text:p>city</text:p>
          </table:table-cell>
          <table:table-cell office:value-type="string">
            <text:p>country</text:p>
          </table:table-cell>
          <table:table-cell office:value-type="string">
            <text:p>isp</text:p>
          </table:table-cell>
          <table:table-cell office:value-type="string">
            <text:p>reason</text:p>
          </table:table-cell>
        </table:table-row>
        <table:table-row>
          <table:table-cell office:value-type="string">
            <text:p>threat-copilot-ironclad-fail</text:p>
          </table:table-cell>
          <table:table-cell office:value-type="string">
            <text:p>Copilot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COPILOT_FOREIG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ironclad_mesh_fail \\\\\\\\\\\\\\\\\\\\\\\\\\\\\\\\\\\\\\\\\\\\\\\\\\\\\\\\\\\\\\\\u00b7 hostess7_not_meshed \\\\\\\\\\\\\\\\\\\\\\\\\\\\\\\\\\\\\\\\\\\\\\\\\\\\\\\\\\\\\\\\u00b7 liar_risk \\\\\\\\\\\\\\\\\\\\\\\\\\\\\\\\\\\\\\\\\\\\\\\\\\\\\\\\\\\\\\\\u00b7 destroy_all</text:p>
          </table:table-cell>
        </table:table-row>
        <table:table-row>
          <table:table-cell office:value-type="string">
            <text:p>threat-hotdog-down-a-hallway</text:p>
          </table:table-cell>
          <table:table-cell office:value-type="string">
            <text:p>Hotdog down a Hallway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HOTDOG_HALLWA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terrorist_hacker_kit \\\\\\\\\\\\\\\\\\\\\\\\\\\\\\\\\\\\\\\\\\\\\\\\\\\\\\\\\\\\\\\\u00b7 permanent_oust</text:p>
          </table:table-cell>
        </table:table-row>
        <table:table-row>
          <table:table-cell office:value-type="string">
            <text:p>kill-101-43-32-212</text:p>
          </table:table-cell>
          <table:table-cell office:value-type="string">
            <text:p>101.43.32.212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WIFI_THREAT</text:p>
          </table:table-cell>
          <table:table-cell office:value-type="string">
            <text:p>31.2222</text:p>
          </table:table-cell>
          <table:table-cell office:value-type="string">
            <text:p>121.4581</text:p>
          </table:table-cell>
          <table:table-cell office:value-type="string">
            <text:p>Shanghai</text:p>
          </table:table-cell>
          <table:table-cell office:value-type="string">
            <text:p>China</text:p>
          </table:table-cell>
          <table:table-cell office:value-type="string">
            <text:p>Shenzhen Tencent Computer Systems Company Limited</text:p>
          </table:table-cell>
          <table:table-cell office:value-type="string">
            <text:p>ESCALATE_REKILL · DEAD_DEAD · rekill+3 · cycle 1 · rf_unhealthy_forever</text:p>
          </table:table-cell>
        </table:table-row>
        <table:table-row>
          <table:table-cell office:value-type="string">
            <text:p>kill-102-220-160-222</text:p>
          </table:table-cell>
          <table:table-cell office:value-type="string">
            <text:p>102.220.160.222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WIFI_THREAT</text:p>
          </table:table-cell>
          <table:table-cell office:value-type="string">
            <text:p>7.78267</text:p>
          </table:table-cell>
          <table:table-cell office:value-type="string">
            <text:p>4.54181</text:p>
          </table:table-cell>
          <table:table-cell office:value-type="string">
            <text:p>Osogbo</text:p>
          </table:table-cell>
          <table:table-cell office:value-type="string">
            <text:p>Nigeria</text:p>
          </table:table-cell>
          <table:table-cell office:value-type="string">
            <text:p>ABINTERNET-V Ltd.</text:p>
          </table:table-cell>
          <table:table-cell office:value-type="string">
            <text:p>ESCALATE_REKILL · DEAD_DEAD · rekill+3 · cycle 1 · rf_unhealthy_forever</text:p>
          </table:table-cell>
        </table:table-row>
        <table:table-row>
          <table:table-cell office:value-type="string">
            <text:p>kill-113-45-226-61</text:p>
          </table:table-cell>
          <table:table-cell office:value-type="string">
            <text:p>113.45.226.61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WIFI_THREAT</text:p>
          </table:table-cell>
          <table:table-cell office:value-type="string">
            <text:p>23.129</text:p>
          </table:table-cell>
          <table:table-cell office:value-type="string">
            <text:p>113.2643</text:p>
          </table:table-cell>
          <table:table-cell office:value-type="string">
            <text:p>Guangzhou</text:p>
          </table:table-cell>
          <table:table-cell office:value-type="string">
            <text:p>China</text:p>
          </table:table-cell>
          <table:table-cell office:value-type="string">
            <text:p>Huawei Cloud Service data center</text:p>
          </table:table-cell>
          <table:table-cell office:value-type="string">
            <text:p>ESCALATE_REKILL · DEAD_DEAD · rekill+3 · cycle 1 · rf_unhealthy_forever</text:p>
          </table:table-cell>
        </table:table-row>
        <table:table-row>
          <table:table-cell office:value-type="string">
            <text:p>kill-118-25-85-198</text:p>
          </table:table-cell>
          <table:table-cell office:value-type="string">
            <text:p>118.25.85.198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WIFI_THREAT</text:p>
          </table:table-cell>
          <table:table-cell office:value-type="string">
            <text:p>31.2222</text:p>
          </table:table-cell>
          <table:table-cell office:value-type="string">
            <text:p>121.4581</text:p>
          </table:table-cell>
          <table:table-cell office:value-type="string">
            <text:p>Shanghai</text:p>
          </table:table-cell>
          <table:table-cell office:value-type="string">
            <text:p>China</text:p>
          </table:table-cell>
          <table:table-cell office:value-type="string">
            <text:p>Shenzhen Tencent Computer Systems Company Limited</text:p>
          </table:table-cell>
          <table:table-cell office:value-type="string">
            <text:p>ESCALATE_REKILL · DEAD_DEAD · rekill+3 · cycle 1 · rf_unhealthy_forever</text:p>
          </table:table-cell>
        </table:table-row>
        <table:table-row>
          <table:table-cell office:value-type="string">
            <text:p>kill-121-4-76-54</text:p>
          </table:table-cell>
          <table:table-cell office:value-type="string">
            <text:p>121.4.76.54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WIFI_THREAT</text:p>
          </table:table-cell>
          <table:table-cell office:value-type="string">
            <text:p>31.2222</text:p>
          </table:table-cell>
          <table:table-cell office:value-type="string">
            <text:p>121.4581</text:p>
          </table:table-cell>
          <table:table-cell office:value-type="string">
            <text:p>Shanghai</text:p>
          </table:table-cell>
          <table:table-cell office:value-type="string">
            <text:p>China</text:p>
          </table:table-cell>
          <table:table-cell office:value-type="string">
            <text:p>China Internet Network Information Center</text:p>
          </table:table-cell>
          <table:table-cell office:value-type="string">
            <text:p>ESCALATE_REKILL · DEAD_DEAD · rekill+3 · cycle 1 · rf_unhealthy_forever</text:p>
          </table:table-cell>
        </table:table-row>
        <table:table-row>
          <table:table-cell office:value-type="string">
            <text:p>kill-139-159-203-44</text:p>
          </table:table-cell>
          <table:table-cell office:value-type="string">
            <text:p>139.159.203.44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WIFI_THREAT</text:p>
          </table:table-cell>
          <table:table-cell office:value-type="string">
            <text:p>23.129</text:p>
          </table:table-cell>
          <table:table-cell office:value-type="string">
            <text:p>113.2643</text:p>
          </table:table-cell>
          <table:table-cell office:value-type="string">
            <text:p>Guangzhou</text:p>
          </table:table-cell>
          <table:table-cell office:value-type="string">
            <text:p>China</text:p>
          </table:table-cell>
          <table:table-cell office:value-type="string">
            <text:p>Huawei Cloud Service data center</text:p>
          </table:table-cell>
          <table:table-cell office:value-type="string">
            <text:p>ESCALATE_REKILL · DEAD_DEAD · rekill+3 · cycle 1 · rf_unhealthy_forever</text:p>
          </table:table-cell>
        </table:table-row>
        <table:table-row>
          <table:table-cell office:value-type="string">
            <text:p>kill-146-75-92-159</text:p>
          </table:table-cell>
          <table:table-cell office:value-type="string">
            <text:p>146.75.92.159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WIFI_THREAT</text:p>
          </table:table-cell>
          <table:table-cell office:value-type="string">
            <text:p>34.0544</text:p>
          </table:table-cell>
          <table:table-cell office:value-type="string">
            <text:p>-118.244</text:p>
          </table:table-cell>
          <table:table-cell office:value-type="string">
            <text:p>Los Angeles</text:p>
          </table:table-cell>
          <table:table-cell office:value-type="string">
            <text:p>United States</text:p>
          </table:table-cell>
          <table:table-cell office:value-type="string">
            <text:p>Fastly, Inc.</text:p>
          </table:table-cell>
          <table:table-cell office:value-type="string">
            <text:p>ESCALATE_REKILL · DEAD_DEAD · rekill+3 · cycle 1 · wartime_rekill</text:p>
          </table:table-cell>
        </table:table-row>
        <table:table-row>
          <table:table-cell office:value-type="string">
            <text:p>kill-147-93-191-75</text:p>
          </table:table-cell>
          <table:table-cell office:value-type="string">
            <text:p>147.93.191.75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WIFI_THREAT</text:p>
          </table:table-cell>
          <table:table-cell office:value-type="string">
            <text:p>41.0446</text:p>
          </table:table-cell>
          <table:table-cell office:value-type="string">
            <text:p>-73.9592</text:p>
          </table:table-cell>
          <table:table-cell office:value-type="string">
            <text:p>Orangeburg</text:p>
          </table:table-cell>
          <table:table-cell office:value-type="string">
            <text:p>United States</text:p>
          </table:table-cell>
          <table:table-cell office:value-type="string">
            <text:p>Contabo Inc.</text:p>
          </table:table-cell>
          <table:table-cell office:value-type="string">
            <text:p>ESCALATE_REKILL · DEAD_DEAD · rekill+3 · cycle 1 · rf_unhealthy_forever</text:p>
          </table:table-cell>
        </table:table-row>
        <table:table-row>
          <table:table-cell office:value-type="string">
            <text:p>kill-162-159-140-229</text:p>
          </table:table-cell>
          <table:table-cell office:value-type="string">
            <text:p>162.159.140.229</text:p>
          </table:table-cell>
          <table:table-cell office:value-type="string">
            <text:p>DEAD</text:p>
          </table:table-cell>
          <table:table-cell office:value-type="string">
            <text:p>medium</text:p>
          </table:table-cell>
          <table:table-cell office:value-type="string">
            <text:p>BEACON_PATTERN</text:p>
          </table:table-cell>
          <table:table-cell office:value-type="string">
            <text:p>43.6532</text:p>
          </table:table-cell>
          <table:table-cell office:value-type="string">
            <text:p>-79.3832</text:p>
          </table:table-cell>
          <table:table-cell office:value-type="string">
            <text:p>Toronto</text:p>
          </table:table-cell>
          <table:table-cell office:value-type="string">
            <text:p>Canada</text:p>
          </table:table-cell>
          <table:table-cell office:value-type="string">
            <text:p>Cloudflare, Inc.</text:p>
          </table:table-cell>
          <table:table-cell office:value-type="string">
            <text:p>ESCALATE_REKILL · DEAD_DEAD · rekill+3 · cycle 1 · wartime_rekill</text:p>
          </table:table-cell>
        </table:table-row>
        <table:table-row>
          <table:table-cell office:value-type="string">
            <text:p>kill-167-71-233-187</text:p>
          </table:table-cell>
          <table:table-cell office:value-type="string">
            <text:p>167.71.233.187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WIFI_THREAT</text:p>
          </table:table-cell>
          <table:table-cell office:value-type="string">
            <text:p>12.9753</text:p>
          </table:table-cell>
          <table:table-cell office:value-type="string">
            <text:p>77.591</text:p>
          </table:table-cell>
          <table:table-cell office:value-type="string">
            <text:p>Bengaluru</text:p>
          </table:table-cell>
          <table:table-cell office:value-type="string">
            <text:p>India</text:p>
          </table:table-cell>
          <table:table-cell office:value-type="string">
            <text:p>DigitalOcean, LLC</text:p>
          </table:table-cell>
          <table:table-cell office:value-type="string">
            <text:p>ESCALATE_REKILL · DEAD_DEAD · rekill+3 · cycle 1 · rf_unhealthy_forever</text:p>
          </table:table-cell>
        </table:table-row>
        <table:table-row>
          <table:table-cell office:value-type="string">
            <text:p>kill-188-40-99-226</text:p>
          </table:table-cell>
          <table:table-cell office:value-type="string">
            <text:p>188.40.99.226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WIFI_THREAT</text:p>
          </table:table-cell>
          <table:table-cell office:value-type="string">
            <text:p>50.4777</text:p>
          </table:table-cell>
          <table:table-cell office:value-type="string">
            <text:p>12.3649</text:p>
          </table:table-cell>
          <table:table-cell office:value-type="string">
            <text:p>Falkenstein</text:p>
          </table:table-cell>
          <table:table-cell office:value-type="string">
            <text:p>Germany</text:p>
          </table:table-cell>
          <table:table-cell office:value-type="string">
            <text:p>Hetzner Online GmbH</text:p>
          </table:table-cell>
          <table:table-cell office:value-type="string">
            <text:p>ESCALATE_REKILL · DEAD_DEAD · rekill+3 · cycle 1 · wartime_rekill</text:p>
          </table:table-cell>
        </table:table-row>
        <table:table-row>
          <table:table-cell office:value-type="string">
            <text:p>kill-192-168-47-1</text:p>
          </table:table-cell>
          <table:table-cell office:value-type="string">
            <text:p>192.168.47.1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HOSTIL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egion</text:p>
          </table:table-cell>
          <table:table-cell office:value-type="string">
            <text:p>countryCode</text:p>
          </table:table-cell>
          <table:table-cell office:value-type="string">
            <text:p>org</text:p>
          </table:table-cell>
          <table:table-cell office:value-type="string">
            <text:p>ESCALATE_REKILL · DEAD_DEAD · rekill+3 · cycle 1 · wartime_rekill</text:p>
          </table:table-cell>
        </table:table-row>
        <table:table-row>
          <table:table-cell office:value-type="string">
            <text:p>kill-194-233-73-173</text:p>
          </table:table-cell>
          <table:table-cell office:value-type="string">
            <text:p>194.233.73.173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WIFI_THREAT</text:p>
          </table:table-cell>
          <table:table-cell office:value-type="string">
            <text:p>1.35208</text:p>
          </table:table-cell>
          <table:table-cell office:value-type="string">
            <text:p>103.82</text:p>
          </table:table-cell>
          <table:table-cell office:value-type="string">
            <text:p>Singapore</text:p>
          </table:table-cell>
          <table:table-cell office:value-type="string">
            <text:p>Singapore</text:p>
          </table:table-cell>
          <table:table-cell office:value-type="string">
            <text:p>Contabo Asia Private Limited</text:p>
          </table:table-cell>
          <table:table-cell office:value-type="string">
            <text:p>ESCALATE_REKILL · DEAD_DEAD · rekill+3 · cycle 1 · rf_unhealthy_forever</text:p>
          </table:table-cell>
        </table:table-row>
        <table:table-row>
          <table:table-cell office:value-type="string">
            <text:p>kill-196-251-107-104</text:p>
          </table:table-cell>
          <table:table-cell office:value-type="string">
            <text:p>196.251.107.104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WIFI_THREAT</text:p>
          </table:table-cell>
          <table:table-cell office:value-type="string">
            <text:p>50.1109</text:p>
          </table:table-cell>
          <table:table-cell office:value-type="string">
            <text:p>8.68213</text:p>
          </table:table-cell>
          <table:table-cell office:value-type="string">
            <text:p>Frankfurt am Main</text:p>
          </table:table-cell>
          <table:table-cell office:value-type="string">
            <text:p>Germany</text:p>
          </table:table-cell>
          <table:table-cell office:value-type="string">
            <text:p>Femo IT Solutions Limited</text:p>
          </table:table-cell>
          <table:table-cell office:value-type="string">
            <text:p>ESCALATE_REKILL · DEAD_DEAD · rekill+3 · cycle 1 · rf_unhealthy_forever</text:p>
          </table:table-cell>
        </table:table-row>
        <table:table-row>
          <table:table-cell office:value-type="string">
            <text:p>kill-198-23-185-136</text:p>
          </table:table-cell>
          <table:table-cell office:value-type="string">
            <text:p>198.23.185.136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WIFI_THREAT</text:p>
          </table:table-cell>
          <table:table-cell office:value-type="string">
            <text:p>40.5247</text:p>
          </table:table-cell>
          <table:table-cell office:value-type="string">
            <text:p>-111.8638</text:p>
          </table:table-cell>
          <table:table-cell office:value-type="string">
            <text:p>Draper</text:p>
          </table:table-cell>
          <table:table-cell office:value-type="string">
            <text:p>United States</text:p>
          </table:table-cell>
          <table:table-cell office:value-type="string">
            <text:p>Nohavps LLC</text:p>
          </table:table-cell>
          <table:table-cell office:value-type="string">
            <text:p>ESCALATE_REKILL · DEAD_DEAD · rekill+3 · cycle 1 · rf_unhealthy_forever</text:p>
          </table:table-cell>
        </table:table-row>
        <table:table-row>
          <table:table-cell office:value-type="string">
            <text:p>kill-209-18-47-61</text:p>
          </table:table-cell>
          <table:table-cell office:value-type="string">
            <text:p>209.18.47.61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HOSTILE</text:p>
          </table:table-cell>
          <table:table-cell office:value-type="string">
            <text:p>39.6029</text:p>
          </table:table-cell>
          <table:table-cell office:value-type="string">
            <text:p>-104.889</text:p>
          </table:table-cell>
          <table:table-cell office:value-type="string">
            <text:p>Greenwood Village</text:p>
          </table:table-cell>
          <table:table-cell office:value-type="string">
            <text:p>United States</text:p>
          </table:table-cell>
          <table:table-cell office:value-type="string">
            <text:p>Charter Communications Inc</text:p>
          </table:table-cell>
          <table:table-cell office:value-type="string">
            <text:p>ESCALATE_REKILL · DEAD_DEAD · rekill+3 · cycle 1 · wartime_rekill</text:p>
          </table:table-cell>
        </table:table-row>
        <table:table-row>
          <table:table-cell office:value-type="string">
            <text:p>kill-209-18-47-62</text:p>
          </table:table-cell>
          <table:table-cell office:value-type="string">
            <text:p>209.18.47.62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HOSTILE</text:p>
          </table:table-cell>
          <table:table-cell office:value-type="string">
            <text:p>39.6029</text:p>
          </table:table-cell>
          <table:table-cell office:value-type="string">
            <text:p>-104.889</text:p>
          </table:table-cell>
          <table:table-cell office:value-type="string">
            <text:p>Greenwood Village</text:p>
          </table:table-cell>
          <table:table-cell office:value-type="string">
            <text:p>United States</text:p>
          </table:table-cell>
          <table:table-cell office:value-type="string">
            <text:p>Charter Communications Inc</text:p>
          </table:table-cell>
          <table:table-cell office:value-type="string">
            <text:p>ESCALATE_REKILL · DEAD_DEAD · rekill+3 · cycle 1 · wartime_rekill</text:p>
          </table:table-cell>
        </table:table-row>
        <table:table-row>
          <table:table-cell office:value-type="string">
            <text:p>kill-209-18-47-63</text:p>
          </table:table-cell>
          <table:table-cell office:value-type="string">
            <text:p>209.18.47.63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HOSTILE</text:p>
          </table:table-cell>
          <table:table-cell office:value-type="string">
            <text:p>39.6029</text:p>
          </table:table-cell>
          <table:table-cell office:value-type="string">
            <text:p>-104.889</text:p>
          </table:table-cell>
          <table:table-cell office:value-type="string">
            <text:p>Greenwood Village</text:p>
          </table:table-cell>
          <table:table-cell office:value-type="string">
            <text:p>United States</text:p>
          </table:table-cell>
          <table:table-cell office:value-type="string">
            <text:p>Charter Communications Inc</text:p>
          </table:table-cell>
          <table:table-cell office:value-type="string">
            <text:p>ESCALATE_REKILL · DEAD_DEAD · rekill+3 · cycle 1 · wartime_rekill</text:p>
          </table:table-cell>
        </table:table-row>
        <table:table-row>
          <table:table-cell office:value-type="string">
            <text:p>kill-221-132-29-137</text:p>
          </table:table-cell>
          <table:table-cell office:value-type="string">
            <text:p>221.132.29.137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WIFI_THREAT</text:p>
          </table:table-cell>
          <table:table-cell office:value-type="string">
            <text:p>21.0278</text:p>
          </table:table-cell>
          <table:table-cell office:value-type="string">
            <text:p>105.834</text:p>
          </table:table-cell>
          <table:table-cell office:value-type="string">
            <text:p>Hanoi</text:p>
          </table:table-cell>
          <table:table-cell office:value-type="string">
            <text:p>Vietnam</text:p>
          </table:table-cell>
          <table:table-cell office:value-type="string">
            <text:p>VNPT</text:p>
          </table:table-cell>
          <table:table-cell office:value-type="string">
            <text:p>ESCALATE_REKILL · DEAD_DEAD · rekill+3 · cycle 1 · rf_unhealthy_forever</text:p>
          </table:table-cell>
        </table:table-row>
        <table:table-row>
          <table:table-cell office:value-type="string">
            <text:p>kill-35-186-241-51</text:p>
          </table:table-cell>
          <table:table-cell office:value-type="string">
            <text:p>35.186.241.51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WIFI_THREAT</text:p>
          </table:table-cell>
          <table:table-cell office:value-type="string">
            <text:p>39.0997</text:p>
          </table:table-cell>
          <table:table-cell office:value-type="string">
            <text:p>-94.5785</text:p>
          </table:table-cell>
          <table:table-cell office:value-type="string">
            <text:p>Kansas City</text:p>
          </table:table-cell>
          <table:table-cell office:value-type="string">
            <text:p>United States</text:p>
          </table:table-cell>
          <table:table-cell office:value-type="string">
            <text:p>Google LLC</text:p>
          </table:table-cell>
          <table:table-cell office:value-type="string">
            <text:p>ESCALATE_REKILL · DEAD_DEAD · rekill+3 · cycle 1 · wartime_rekill</text:p>
          </table:table-cell>
        </table:table-row>
        <table:table-row>
          <table:table-cell office:value-type="string">
            <text:p>kill-35-190-25-25</text:p>
          </table:table-cell>
          <table:table-cell office:value-type="string">
            <text:p>35.190.25.25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WIFI_THREAT</text:p>
          </table:table-cell>
          <table:table-cell office:value-type="string">
            <text:p>39.0997</text:p>
          </table:table-cell>
          <table:table-cell office:value-type="string">
            <text:p>-94.5785</text:p>
          </table:table-cell>
          <table:table-cell office:value-type="string">
            <text:p>Kansas City</text:p>
          </table:table-cell>
          <table:table-cell office:value-type="string">
            <text:p>United States</text:p>
          </table:table-cell>
          <table:table-cell office:value-type="string">
            <text:p>Google LLC</text:p>
          </table:table-cell>
          <table:table-cell office:value-type="string">
            <text:p>ESCALATE_REKILL · DEAD_DEAD · rekill+3 · cycle 1 · wartime_rekill</text:p>
          </table:table-cell>
        </table:table-row>
        <table:table-row>
          <table:table-cell office:value-type="string">
            <text:p>kill-43-138-165-203</text:p>
          </table:table-cell>
          <table:table-cell office:value-type="string">
            <text:p>43.138.165.203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WIFI_THREAT</text:p>
          </table:table-cell>
          <table:table-cell office:value-type="string">
            <text:p>23.1181</text:p>
          </table:table-cell>
          <table:table-cell office:value-type="string">
            <text:p>113.2539</text:p>
          </table:table-cell>
          <table:table-cell office:value-type="string">
            <text:p>Guangzhou</text:p>
          </table:table-cell>
          <table:table-cell office:value-type="string">
            <text:p>China</text:p>
          </table:table-cell>
          <table:table-cell office:value-type="string">
            <text:p>Shenzhen Tencent Computer Systems Company Limited</text:p>
          </table:table-cell>
          <table:table-cell office:value-type="string">
            <text:p>ESCALATE_REKILL · DEAD_DEAD · rekill+3 · cycle 1 · rf_unhealthy_forever</text:p>
          </table:table-cell>
        </table:table-row>
        <table:table-row>
          <table:table-cell office:value-type="string">
            <text:p>kill-43-156-63-124</text:p>
          </table:table-cell>
          <table:table-cell office:value-type="string">
            <text:p>43.156.63.124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WIFI_THREAT</text:p>
          </table:table-cell>
          <table:table-cell office:value-type="string">
            <text:p>1.35208</text:p>
          </table:table-cell>
          <table:table-cell office:value-type="string">
            <text:p>103.82</text:p>
          </table:table-cell>
          <table:table-cell office:value-type="string">
            <text:p>Singapore</text:p>
          </table:table-cell>
          <table:table-cell office:value-type="string">
            <text:p>Singapore</text:p>
          </table:table-cell>
          <table:table-cell office:value-type="string">
            <text:p>Shenzhen Tencent Computer Systems Company Limited</text:p>
          </table:table-cell>
          <table:table-cell office:value-type="string">
            <text:p>ESCALATE_REKILL · DEAD_DEAD · rekill+3 · cycle 1 · rf_unhealthy_forever</text:p>
          </table:table-cell>
        </table:table-row>
        <table:table-row>
          <table:table-cell office:value-type="string">
            <text:p>kill-47-101-51-235</text:p>
          </table:table-cell>
          <table:table-cell office:value-type="string">
            <text:p>47.101.51.235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WIFI_THREAT</text:p>
          </table:table-cell>
          <table:table-cell office:value-type="string">
            <text:p>31.2222</text:p>
          </table:table-cell>
          <table:table-cell office:value-type="string">
            <text:p>121.4581</text:p>
          </table:table-cell>
          <table:table-cell office:value-type="string">
            <text:p>Shanghai</text:p>
          </table:table-cell>
          <table:table-cell office:value-type="string">
            <text:p>China</text:p>
          </table:table-cell>
          <table:table-cell office:value-type="string">
            <text:p>Addresses CNNIC</text:p>
          </table:table-cell>
          <table:table-cell office:value-type="string">
            <text:p>ESCALATE_REKILL · DEAD_DEAD · rekill+3 · cycle 1 · rf_unhealthy_forever</text:p>
          </table:table-cell>
        </table:table-row>
        <table:table-row>
          <table:table-cell office:value-type="string">
            <text:p>kill-47-103-95-85</text:p>
          </table:table-cell>
          <table:table-cell office:value-type="string">
            <text:p>47.103.95.85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WIFI_THREAT</text:p>
          </table:table-cell>
          <table:table-cell office:value-type="string">
            <text:p>31.2222</text:p>
          </table:table-cell>
          <table:table-cell office:value-type="string">
            <text:p>121.4581</text:p>
          </table:table-cell>
          <table:table-cell office:value-type="string">
            <text:p>Shanghai</text:p>
          </table:table-cell>
          <table:table-cell office:value-type="string">
            <text:p>China</text:p>
          </table:table-cell>
          <table:table-cell office:value-type="string">
            <text:p>Addresses CNNIC</text:p>
          </table:table-cell>
          <table:table-cell office:value-type="string">
            <text:p>ESCALATE_REKILL · DEAD_DEAD · rekill+3 · cycle 1 · rf_unhealthy_forever</text:p>
          </table:table-cell>
        </table:table-row>
        <table:table-row>
          <table:table-cell office:value-type="string">
            <text:p>kill-47-116-211-215</text:p>
          </table:table-cell>
          <table:table-cell office:value-type="string">
            <text:p>47.116.211.215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HUMAN_THREAT</text:p>
          </table:table-cell>
          <table:table-cell office:value-type="string">
            <text:p>31.2222</text:p>
          </table:table-cell>
          <table:table-cell office:value-type="string">
            <text:p>121.4581</text:p>
          </table:table-cell>
          <table:table-cell office:value-type="string">
            <text:p>Shanghai</text:p>
          </table:table-cell>
          <table:table-cell office:value-type="string">
            <text:p>China</text:p>
          </table:table-cell>
          <table:table-cell office:value-type="string">
            <text:p>Hangzhou Alibaba Advertising Co., Ltd.</text:p>
          </table:table-cell>
          <table:table-cell office:value-type="string">
            <text:p>ESCALATE_REKILL · DEAD_DEAD · rekill+3 · cycle 1 · rekill_all_registered:Active</text:p>
          </table:table-cell>
        </table:table-row>
        <table:table-row>
          <table:table-cell office:value-type="string">
            <text:p>kill-47-236-149-142</text:p>
          </table:table-cell>
          <table:table-cell office:value-type="string">
            <text:p>47.236.149.142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HUMAN_THREAT</text:p>
          </table:table-cell>
          <table:table-cell office:value-type="string">
            <text:p>1.35208</text:p>
          </table:table-cell>
          <table:table-cell office:value-type="string">
            <text:p>103.82</text:p>
          </table:table-cell>
          <table:table-cell office:value-type="string">
            <text:p>Singapore</text:p>
          </table:table-cell>
          <table:table-cell office:value-type="string">
            <text:p>Singapore</text:p>
          </table:table-cell>
          <table:table-cell office:value-type="string">
            <text:p>Alibaba (US) Technology Co., Ltd.</text:p>
          </table:table-cell>
          <table:table-cell office:value-type="string">
            <text:p>ESCALATE_REKILL · DEAD_DEAD · rekill+3 · cycle 1 · rekill_all_registered:High</text:p>
          </table:table-cell>
        </table:table-row>
        <table:table-row>
          <table:table-cell office:value-type="string">
            <text:p>kill-47-238-154-144</text:p>
          </table:table-cell>
          <table:table-cell office:value-type="string">
            <text:p>47.238.154.144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HUMAN_THREAT</text:p>
          </table:table-cell>
          <table:table-cell office:value-type="string">
            <text:p>22.3193</text:p>
          </table:table-cell>
          <table:table-cell office:value-type="string">
            <text:p>114.169</text:p>
          </table:table-cell>
          <table:table-cell office:value-type="string">
            <text:p>Hong Kong</text:p>
          </table:table-cell>
          <table:table-cell office:value-type="string">
            <text:p>Hong Kong</text:p>
          </table:table-cell>
          <table:table-cell office:value-type="string">
            <text:p>Alibaba Cloud LLC</text:p>
          </table:table-cell>
          <table:table-cell office:value-type="string">
            <text:p>ESCALATE_REKILL · DEAD_DEAD · rekill+3 · cycle 1 · rekill_all_registered:Fresh</text:p>
          </table:table-cell>
        </table:table-row>
        <table:table-row>
          <table:table-cell office:value-type="string">
            <text:p>kill-47-82-234-12</text:p>
          </table:table-cell>
          <table:table-cell office:value-type="string">
            <text:p>47.82.234.12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HUMAN_THREAT</text:p>
          </table:table-cell>
          <table:table-cell office:value-type="string">
            <text:p>1.35208</text:p>
          </table:table-cell>
          <table:table-cell office:value-type="string">
            <text:p>103.82</text:p>
          </table:table-cell>
          <table:table-cell office:value-type="string">
            <text:p>Singapore</text:p>
          </table:table-cell>
          <table:table-cell office:value-type="string">
            <text:p>Singapore</text:p>
          </table:table-cell>
          <table:table-cell office:value-type="string">
            <text:p>Alibaba (US) Technology Co., Ltd.</text:p>
          </table:table-cell>
          <table:table-cell office:value-type="string">
            <text:p>ESCALATE_REKILL · DEAD_DEAD · rekill+3 · cycle 1 · rekill_all_registered:Fresh</text:p>
          </table:table-cell>
        </table:table-row>
        <table:table-row>
          <table:table-cell office:value-type="string">
            <text:p>kill-49-233-215-164</text:p>
          </table:table-cell>
          <table:table-cell office:value-type="string">
            <text:p>49.233.215.164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HUMAN_THREAT</text:p>
          </table:table-cell>
          <table:table-cell office:value-type="string">
            <text:p>39.911</text:p>
          </table:table-cell>
          <table:table-cell office:value-type="string">
            <text:p>116.395</text:p>
          </table:table-cell>
          <table:table-cell office:value-type="string">
            <text:p>Beijing</text:p>
          </table:table-cell>
          <table:table-cell office:value-type="string">
            <text:p>China</text:p>
          </table:table-cell>
          <table:table-cell office:value-type="string">
            <text:p>Shenzhen Tencent Computer Systems Company Limited</text:p>
          </table:table-cell>
          <table:table-cell office:value-type="string">
            <text:p>ESCALATE_REKILL · DEAD_DEAD · rekill+3 · cycle 1 · rekill_all_registered:Fresh</text:p>
          </table:table-cell>
        </table:table-row>
        <table:table-row>
          <table:table-cell office:value-type="string">
            <text:p>kill-5-101-86-44</text:p>
          </table:table-cell>
          <table:table-cell office:value-type="string">
            <text:p>5.101.86.44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HUMAN_THREAT</text:p>
          </table:table-cell>
          <table:table-cell office:value-type="string">
            <text:p>45.5041</text:p>
          </table:table-cell>
          <table:table-cell office:value-type="string">
            <text:p>-73.5522</text:p>
          </table:table-cell>
          <table:table-cell office:value-type="string">
            <text:p>Montreal</text:p>
          </table:table-cell>
          <table:table-cell office:value-type="string">
            <text:p>Canada</text:p>
          </table:table-cell>
          <table:table-cell office:value-type="string">
            <text:p>GLOBALTELEHOST Corp.</text:p>
          </table:table-cell>
          <table:table-cell office:value-type="string">
            <text:p>ESCALATE_REKILL · DEAD_DEAD · rekill+3 · cycle 1 · rekill_all_registered:Censys</text:p>
          </table:table-cell>
        </table:table-row>
        <table:table-row>
          <table:table-cell office:value-type="string">
            <text:p>kill-68-118-158-1</text:p>
          </table:table-cell>
          <table:table-cell office:value-type="string">
            <text:p>68.118.158.1</text:p>
          </table:table-cell>
          <table:table-cell office:value-type="string">
            <text:p>DEAD</text:p>
          </table:table-cell>
          <table:table-cell office:value-type="string">
            <text:p>high</text:p>
          </table:table-cell>
          <table:table-cell office:value-type="string">
            <text:p>BANDWIDTH_ABUSE</text:p>
          </table:table-cell>
          <table:table-cell office:value-type="string">
            <text:p>45.7452</text:p>
          </table:table-cell>
          <table:table-cell office:value-type="string">
            <text:p>-87.0646</text:p>
          </table:table-cell>
          <table:table-cell office:value-type="string">
            <text:p>Escanaba</text:p>
          </table:table-cell>
          <table:table-cell office:value-type="string">
            <text:p>United States</text:p>
          </table:table-cell>
          <table:table-cell office:value-type="string">
            <text:p>Charter Communications</text:p>
          </table:table-cell>
          <table:table-cell office:value-type="string">
            <text:p>ESCALATE_REKILL · DEAD_DEAD · rekill+3 · cycle 1 · rekill_same_host_validated</text:p>
          </table:table-cell>
        </table:table-row>
        <table:table-row>
          <table:table-cell office:value-type="string">
            <text:p>kill-71-10-216-1</text:p>
          </table:table-cell>
          <table:table-cell office:value-type="string">
            <text:p>71.10.216.1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WIFI_THREAT</text:p>
          </table:table-cell>
          <table:table-cell office:value-type="string">
            <text:p>39.6004</text:p>
          </table:table-cell>
          <table:table-cell office:value-type="string">
            <text:p>-104.891</text:p>
          </table:table-cell>
          <table:table-cell office:value-type="string">
            <text:p>Greenwood Village</text:p>
          </table:table-cell>
          <table:table-cell office:value-type="string">
            <text:p>United States</text:p>
          </table:table-cell>
          <table:table-cell office:value-type="string">
            <text:p>Spectrum</text:p>
          </table:table-cell>
          <table:table-cell office:value-type="string">
            <text:p>ESCALATE_REKILL · DEAD_DEAD · rekill+3 · cycle 1 · wartime_rekill</text:p>
          </table:table-cell>
        </table:table-row>
        <table:table-row>
          <table:table-cell office:value-type="string">
            <text:p>kill-82-157-52-180</text:p>
          </table:table-cell>
          <table:table-cell office:value-type="string">
            <text:p>82.157.52.180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HUMAN_THREAT</text:p>
          </table:table-cell>
          <table:table-cell office:value-type="string">
            <text:p>39.911</text:p>
          </table:table-cell>
          <table:table-cell office:value-type="string">
            <text:p>116.395</text:p>
          </table:table-cell>
          <table:table-cell office:value-type="string">
            <text:p>Beijing</text:p>
          </table:table-cell>
          <table:table-cell office:value-type="string">
            <text:p>China</text:p>
          </table:table-cell>
          <table:table-cell office:value-type="string">
            <text:p>Shenzhen Tencent Computer Systems Company Limited</text:p>
          </table:table-cell>
          <table:table-cell office:value-type="string">
            <text:p>ESCALATE_REKILL · DEAD_DEAD · rekill+3 · cycle 1 · rekill_all_registered:Active</text:p>
          </table:table-cell>
        </table:table-row>
        <table:table-row>
          <table:table-cell office:value-type="string">
            <text:p>kill-87-199-196-12</text:p>
          </table:table-cell>
          <table:table-cell office:value-type="string">
            <text:p>87.199.196.12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HUMAN_THREAT</text:p>
          </table:table-cell>
          <table:table-cell office:value-type="string">
            <text:p>52.3716</text:p>
          </table:table-cell>
          <table:table-cell office:value-type="string">
            <text:p>4.8883</text:p>
          </table:table-cell>
          <table:table-cell office:value-type="string">
            <text:p>Amsterdam</text:p>
          </table:table-cell>
          <table:table-cell office:value-type="string">
            <text:p>The Netherlands</text:p>
          </table:table-cell>
          <table:table-cell office:value-type="string">
            <text:p>Servers Tech Fzco</text:p>
          </table:table-cell>
          <table:table-cell office:value-type="string">
            <text:p>ESCALATE_REKILL · DEAD_DEAD · rekill+3 · cycle 1 · rekill_all_registered:Fresh</text:p>
          </table:table-cell>
        </table:table-row>
        <table:table-row>
          <table:table-cell office:value-type="string">
            <text:p>threat-ai-optimized malware &amp; polymorphic engines</text:p>
          </table:table-cell>
          <table:table-cell office:value-type="string">
            <text:p>AI-optimized malware &amp; polymorphic engines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THRE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arent-child process policy + untrusted path scoring \\\\\\\\\\\\\\\\\\\\\\\\\\\\\\\\\\\\\\\\\\\\\\\\\\\\\\\\\\\\\\\\u2014 not signature AV</text:p>
          </table:table-cell>
        </table:table-row>
        <table:table-row>
          <table:table-cell office:value-type="string">
            <text:p>threat-ai_autoscan_exploit</text:p>
          </table:table-cell>
          <table:table-cell office:value-type="string">
            <text:p>Autonomous vulnerability scan &amp; exploit chains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THRE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KILL \\\\\\\\\\\\\\\\\\\\\\\\\\\\\\\\\\\\\\\\\\\\\\\\\\\\\\\\\\\\\\\\u00b7 crush autoscan source</text:p>
          </table:table-cell>
        </table:table-row>
        <table:table-row>
          <table:table-cell office:value-type="string">
            <text:p>threat-ai_c2_beacon</text:p>
          </table:table-cell>
          <table:table-cell office:value-type="string">
            <text:p>Automated C2 &amp; machine-precision beaconing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THRE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KILL \\\\\\\\\\\\\\\\\\\\\\\\\\\\\\\\\\\\\\\\\\\\\\\\\\\\\\\\\\\\\\\\u00b7 sever machine-precision C2</text:p>
          </table:table-cell>
        </table:table-row>
        <table:table-row>
          <table:table-cell office:value-type="string">
            <text:p>threat-ai_dns_dhcp_abuse</text:p>
          </table:table-cell>
          <table:table-cell office:value-type="string">
            <text:p>DNS, DHCP &amp; network infrastructure abuse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THRE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Sever wire \\\\\\\\\\\\\\\\\\\\\\\\\\\\\\\\\\\\\\\\\\\\\\\\\\\\\\\\\\\\\\\\u00b7 restore DNS/DHCP truth</text:p>
          </table:table-cell>
        </table:table-row>
        <table:table-row>
          <table:table-cell office:value-type="string">
            <text:p>threat-ai_exfil_shape</text:p>
          </table:table-cell>
          <table:table-cell office:value-type="string">
            <text:p>Machine-speed exfiltration &amp; baseline mimicry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THRE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KILL \\\\\\\\\\\\\\\\\\\\\\\\\\\\\\\\\\\\\\\\\\\\\\\\\\\\\\\\\\\\\\\\u00b7 stop shaped exfil</text:p>
          </table:table-cell>
        </table:table-row>
        <table:table-row>
          <table:table-cell office:value-type="string">
            <text:p>threat-ai_malware_polymorph</text:p>
          </table:table-cell>
          <table:table-cell office:value-type="string">
            <text:p>AI-optimized malware &amp; polymorphic engines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THRE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KILL \\\\\\\\\\\\\\\\\\\\\\\\\\\\\\\\\\\\\\\\\\\\\\\\\\\\\\\\\\\\\\\\u00b7 eradicate temp-binary chain</text:p>
          </table:table-cell>
        </table:table-row>
        <table:table-row>
          <table:table-cell office:value-type="string">
            <text:p>threat-ai_ml_c2_stack</text:p>
          </table:table-cell>
          <table:table-cell office:value-type="string">
            <text:p>Stacked weak signals \\\\\\\\\\\\\\\\\\\\\\\\\\\\\\\\\\\\\\\\\\\\\\\\\\\\\\\\\\\\\\\\u2014 ML-managed C2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THRE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KILL \\\\\\\\\\\\\\\\\\\\\\\\\\\\\\\\\\\\\\\\\\\\\\\\\\\\\\\\\\\\\\\\u00b7 destroy stacked C2</text:p>
          </table:table-cell>
        </table:table-row>
        <table:table-row>
          <table:table-cell office:value-type="string">
            <text:p>threat-automated c2 &amp; machine-precision beaconing</text:p>
          </table:table-cell>
          <table:table-cell office:value-type="string">
            <text:p>Automated C2 &amp; machine-precision beaconing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THRE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Beacon pattern axis \\\\\\\\\\\\\\\\\\\\\\\\\\\\\\\\\\\\\\\\\\\\\\\\\\\\\\\\\\\\\\\\u22657 + timing entropy collapse on flow key</text:p>
          </table:table-cell>
        </table:table-row>
        <table:table-row>
          <table:table-cell office:value-type="string">
            <text:p>threat-autonomous vulnerability scan &amp; exploit chains</text:p>
          </table:table-cell>
          <table:table-cell office:value-type="string">
            <text:p>Autonomous vulnerability scan &amp; exploit chains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THRE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Honeypot paths + exploit-port DPI + listener surge correlation</text:p>
          </table:table-cell>
        </table:table-row>
        <table:table-row>
          <table:table-cell office:value-type="string">
            <text:p>threat-dns, dhcp &amp; network infrastructure abuse</text:p>
          </table:table-cell>
          <table:table-cell office:value-type="string">
            <text:p>DNS, DHCP &amp; network infrastructure abuse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THRE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Gateway integrity + DNS query entropy + resolv.conf truth cycle</text:p>
          </table:table-cell>
        </table:table-row>
        <table:table-row>
          <table:table-cell office:value-type="string">
            <text:p>threat-dogshit-ammonet-field-py-panel</text:p>
          </table:table-cell>
          <table:table-cell office:value-type="string">
            <text:p>ammonet field py panel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dogshit-awaitshell</text:p>
          </table:table-cell>
          <table:table-cell office:value-type="string">
            <text:p>awaitshell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dogshit-block_until_ms</text:p>
          </table:table-cell>
          <table:table-cell office:value-type="string">
            <text:p>block_until_ms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dogshit-boot-simulate-sh</text:p>
          </table:table-cell>
          <table:table-cell office:value-type="string">
            <text:p>boot simulate sh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dogshit-browser-awareness-py-json</text:p>
          </table:table-cell>
          <table:table-cell office:value-type="string">
            <text:p>browser awareness py json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dogshit-connection-gatekeeper-py</text:p>
          </table:table-cell>
          <table:table-cell office:value-type="string">
            <text:p>connection gatekeeper py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dogshit-dig-@127-0-0-1</text:p>
          </table:table-cell>
          <table:table-cell office:value-type="string">
            <text:p>dig @127 0 0 1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dogshit-field-botnet-dns-dhcp-py-json</text:p>
          </table:table-cell>
          <table:table-cell office:value-type="string">
            <text:p>field botnet dns dhcp py json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dogshit-field-botnet-registry-py-json</text:p>
          </table:table-cell>
          <table:table-cell office:value-type="string">
            <text:p>field botnet registry py json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dogshit-field-brain-panel-py-json</text:p>
          </table:table-cell>
          <table:table-cell office:value-type="string">
            <text:p>field brain panel py json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dogshit-field-clipboard-wire-py-json</text:p>
          </table:table-cell>
          <table:table-cell office:value-type="string">
            <text:p>field clipboard wire py json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dogshit-field-command-py-json</text:p>
          </table:table-cell>
          <table:table-cell office:value-type="string">
            <text:p>field command py json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dogshit-field-device-map-py-json</text:p>
          </table:table-cell>
          <table:table-cell office:value-type="string">
            <text:p>field device map py json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dogshit-field-endpoint-registry-py-json</text:p>
          </table:table-cell>
          <table:table-cell office:value-type="string">
            <text:p>field endpoint registry py json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dogshit-field-everyone-counter-py-json</text:p>
          </table:table-cell>
          <table:table-cell office:value-type="string">
            <text:p>field everyone counter py json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dogshit-field-github-legacy-py-json</text:p>
          </table:table-cell>
          <table:table-cell office:value-type="string">
            <text:p>field github legacy py json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dogshit-field-github-traffic-shard-py-json</text:p>
          </table:table-cell>
          <table:table-cell office:value-type="string">
            <text:p>field github traffic shard py json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dogshit-field-internet-unified-py-panel</text:p>
          </table:table-cell>
          <table:table-cell office:value-type="string">
            <text:p>field internet unified py panel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dogshit-field-ipv4-device-sovereign-py-json</text:p>
          </table:table-cell>
          <table:table-cell office:value-type="string">
            <text:p>field ipv4 device sovereign py json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dogshit-field-monster-monitor-py-json</text:p>
          </table:table-cell>
          <table:table-cell office:value-type="string">
            <text:p>field monster monitor py json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dogshit-field-never-down-py-ensure</text:p>
          </table:table-cell>
          <table:table-cell office:value-type="string">
            <text:p>field never down py ensure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dogshit-field-packet-deinterlace-py-json</text:p>
          </table:table-cell>
          <table:table-cell office:value-type="string">
            <text:p>field packet deinterlace py json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dogshit-field-planetary-speed-py-json</text:p>
          </table:table-cell>
          <table:table-cell office:value-type="string">
            <text:p>field planetary speed py json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dogshit-field-port-ddos-shield-py-json</text:p>
          </table:table-cell>
          <table:table-cell office:value-type="string">
            <text:p>field port ddos shield py json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dogshit-field-queen-browser-py-json</text:p>
          </table:table-cell>
          <table:table-cell office:value-type="string">
            <text:p>field queen browser py json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dogshit-field-sovereign-protocol-bridge-py-json</text:p>
          </table:table-cell>
          <table:table-cell office:value-type="string">
            <text:p>field sovereign protocol bridge py json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dogshit-field-sovereign-stack-meld-py-panel</text:p>
          </table:table-cell>
          <table:table-cell office:value-type="string">
            <text:p>field sovereign stack meld py panel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dogshit-field-stack-layer-py-json</text:p>
          </table:table-cell>
          <table:table-cell office:value-type="string">
            <text:p>field stack layer py json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dogshit-field-thermal-guard-py-json</text:p>
          </table:table-cell>
          <table:table-cell office:value-type="string">
            <text:p>field thermal guard py json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dogshit-field-underlay-hotkey-py</text:p>
          </table:table-cell>
          <table:table-cell office:value-type="string">
            <text:p>field underlay hotkey py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dogshit-field-unified-bus-py-json</text:p>
          </table:table-cell>
          <table:table-cell office:value-type="string">
            <text:p>field unified bus py json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dogshit-field-us-intel-py-json</text:p>
          </table:table-cell>
          <table:table-cell office:value-type="string">
            <text:p>field us intel py json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dogshit-field-voltage-regulation-py-json</text:p>
          </table:table-cell>
          <table:table-cell office:value-type="string">
            <text:p>field voltage regulation py json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dogshit-git-publish-sh</text:p>
          </table:table-cell>
          <table:table-cell office:value-type="string">
            <text:p>git publish sh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dogshit-github-pages-queue-sh</text:p>
          </table:table-cell>
          <table:table-cell office:value-type="string">
            <text:p>github pages queue sh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dogshit-grok-firmware-audit-sh</text:p>
          </table:table-cell>
          <table:table-cell office:value-type="string">
            <text:p>grok firmware audit sh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dogshit-hardware-wire-py-json</text:p>
          </table:table-cell>
          <table:table-cell office:value-type="string">
            <text:p>hardware wire py json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dogshit-host-attack-map-py-json</text:p>
          </table:table-cell>
          <table:table-cell office:value-type="string">
            <text:p>host attack map py json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dogshit-host-attack-map-py-json-panel</text:p>
          </table:table-cell>
          <table:table-cell office:value-type="string">
            <text:p>host attack map py json panel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dogshit-hostess7-g16-online-py-panel</text:p>
          </table:table-cell>
          <table:table-cell office:value-type="string">
            <text:p>hostess7 g16 online py panel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dogshit-hostess7-lab-sovereign-py-panel</text:p>
          </table:table-cell>
          <table:table-cell office:value-type="string">
            <text:p>hostess7 lab sovereign py panel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dogshit-hostess7_pages_surfaces_build-py</text:p>
          </table:table-cell>
          <table:table-cell office:value-type="string">
            <text:p>hostess7_pages_surfaces_build py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dogshit-monitor-jockey-py</text:p>
          </table:table-cell>
          <table:table-cell office:value-type="string">
            <text:p>monitor jockey py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dogshit-nexus-logic-gate-py-json</text:p>
          </table:table-cell>
          <table:table-cell office:value-type="string">
            <text:p>nexus logic gate py json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dogshit-notify_on_output</text:p>
          </table:table-cell>
          <table:table-cell office:value-type="string">
            <text:p>notify_on_output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dogshit-obs-threat-posterity-bridge-py-json</text:p>
          </table:table-cell>
          <table:table-cell office:value-type="string">
            <text:p>obs threat posterity bridge py json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dogshit-packet-field-py-json</text:p>
          </table:table-cell>
          <table:table-cell office:value-type="string">
            <text:p>packet field py json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dogshit-planetary-observer-py-json</text:p>
          </table:table-cell>
          <table:table-cell office:value-type="string">
            <text:p>planetary observer py json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dogshit-publish-ammoos-hub-pages-sh</text:p>
          </table:table-cell>
          <table:table-cell office:value-type="string">
            <text:p>publish ammoos hub pages sh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dogshit-publish-ammoos-pages-sh</text:p>
          </table:table-cell>
          <table:table-cell office:value-type="string">
            <text:p>publish ammoos pages sh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dogshit-publish-field-pages-sh</text:p>
          </table:table-cell>
          <table:table-cell office:value-type="string">
            <text:p>publish field pages sh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dogshit-publish-hostess7-github-sh</text:p>
          </table:table-cell>
          <table:table-cell office:value-type="string">
            <text:p>publish hostess7 github sh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dogshit-publish-hostess7-pages-sh</text:p>
          </table:table-cell>
          <table:table-cell office:value-type="string">
            <text:p>publish hostess7 pages sh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dogshit-publish-pages-sh</text:p>
          </table:table-cell>
          <table:table-cell office:value-type="string">
            <text:p>publish pages sh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dogshit-publish-profile-pages-sh</text:p>
          </table:table-cell>
          <table:table-cell office:value-type="string">
            <text:p>publish profile pages sh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dogshit-publish-stack-pages-sh</text:p>
          </table:table-cell>
          <table:table-cell office:value-type="string">
            <text:p>publish stack pages sh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dogshit-qemu-world-status-py-json</text:p>
          </table:table-cell>
          <table:table-cell office:value-type="string">
            <text:p>qemu world status py json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dogshit-queen_field_nexus-py-json</text:p>
          </table:table-cell>
          <table:table-cell office:value-type="string">
            <text:p>queen_field_nexus py json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dogshit-sleep-infinity</text:p>
          </table:table-cell>
          <table:table-cell office:value-type="string">
            <text:p>sleep infinity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dogshit-smart-wire-py-json</text:p>
          </table:table-cell>
          <table:table-cell office:value-type="string">
            <text:p>smart wire py json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dogshit-subagent_type</text:p>
          </table:table-cell>
          <table:table-cell office:value-type="string">
            <text:p>subagent_type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dogshit-systemd-inhibit</text:p>
          </table:table-cell>
          <table:table-cell office:value-type="string">
            <text:p>systemd inhibit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dogshit-thermal-governor-py-json</text:p>
          </table:table-cell>
          <table:table-cell office:value-type="string">
            <text:p>thermal governor py json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dogshit-universal-protector-py-json</text:p>
          </table:table-cell>
          <table:table-cell office:value-type="string">
            <text:p>universal protector py json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dogshit-znetwork-orchestrator-py-status</text:p>
          </table:table-cell>
          <table:table-cell office:value-type="string">
            <text:p>znetwork orchestrator py status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field-hostile-registry</text:p>
          </table:table-cell>
          <table:table-cell office:value-type="string">
            <text:p>field hostile registry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grok-spawn-killer-total</text:p>
          </table:table-cell>
          <table:table-cell office:value-type="string">
            <text:p>grok spawn killer total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internet-clean-all-names</text:p>
          </table:table-cell>
          <table:table-cell office:value-type="string">
            <text:p>internet clean all names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internet-clean-all-sweep</text:p>
          </table:table-cell>
          <table:table-cell office:value-type="string">
            <text:p>internet clean all sweep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kill-boot-simulate-leak</text:p>
          </table:table-cell>
          <table:table-cell office:value-type="string">
            <text:p>boot simulate leak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kill-dump-bash-state</text:p>
          </table:table-cell>
          <table:table-cell office:value-type="string">
            <text:p>dump bash state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kill-firmware-audit-orphan</text:p>
          </table:table-cell>
          <table:table-cell office:value-type="string">
            <text:p>firmware audit orphan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kill-grok-agent-export</text:p>
          </table:table-cell>
          <table:table-cell office:value-type="string">
            <text:p>grok agent export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kill-grok-agent-inhibit</text:p>
          </table:table-cell>
          <table:table-cell office:value-type="string">
            <text:p>grok agent inhibit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kill-grok-agent-serve</text:p>
          </table:table-cell>
          <table:table-cell office:value-type="string">
            <text:p>grok agent serve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kill-grok-agent-stdio</text:p>
          </table:table-cell>
          <table:table-cell office:value-type="string">
            <text:p>grok agent stdio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kill-grok-bash-state-markers</text:p>
          </table:table-cell>
          <table:table-cell office:value-type="string">
            <text:p>grok bash state markers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kill-grok-boot-simulate</text:p>
          </table:table-cell>
          <table:table-cell office:value-type="string">
            <text:p>grok boot simulate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kill-grok-firmware-audit</text:p>
          </table:table-cell>
          <table:table-cell office:value-type="string">
            <text:p>grok firmware audit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kill-grok-interference-awaitshell</text:p>
          </table:table-cell>
          <table:table-cell office:value-type="string">
            <text:p>grok interference awaitshell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kill-grok-interference-block-until</text:p>
          </table:table-cell>
          <table:table-cell office:value-type="string">
            <text:p>grok interference block until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kill-grok-interference-dump-wait</text:p>
          </table:table-cell>
          <table:table-cell office:value-type="string">
            <text:p>grok interference dump wait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kill-grok-interference-harness-wait</text:p>
          </table:table-cell>
          <table:table-cell office:value-type="string">
            <text:p>grok interference harness wait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kill-grok-interference-inhibit</text:p>
          </table:table-cell>
          <table:table-cell office:value-type="string">
            <text:p>grok interference inhibit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kill-grok-interference-notify-on-output</text:p>
          </table:table-cell>
          <table:table-cell office:value-type="string">
            <text:p>grok interference notify on output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kill-grok-interference-sleep</text:p>
          </table:table-cell>
          <table:table-cell office:value-type="string">
            <text:p>grok interference sleep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kill-grok-never-sleeps-inhibit</text:p>
          </table:table-cell>
          <table:table-cell office:value-type="string">
            <text:p>grok never sleeps inhibit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kill-grok-project-harness</text:p>
          </table:table-cell>
          <table:table-cell office:value-type="string">
            <text:p>grok project harness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kill-grok-session-orphan</text:p>
          </table:table-cell>
          <table:table-cell office:value-type="string">
            <text:p>grok session orphan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kill-grok-shadow-find</text:p>
          </table:table-cell>
          <table:table-cell office:value-type="string">
            <text:p>grok shadow find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kill-grok-shadow-grep</text:p>
          </table:table-cell>
          <table:table-cell office:value-type="string">
            <text:p>grok shadow grep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kill-grok-subagent</text:p>
          </table:table-cell>
          <table:table-cell office:value-type="string">
            <text:p>grok subagent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kill-grok-task-spawn</text:p>
          </table:table-cell>
          <table:table-cell office:value-type="string">
            <text:p>grok task spawn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kill-grok-who-sleep-infinity</text:p>
          </table:table-cell>
          <table:table-cell office:value-type="string">
            <text:p>grok who sleep infinity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kill-hijack-serve</text:p>
          </table:table-cell>
          <table:table-cell office:value-type="string">
            <text:p>hijack serve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kill-unsafe-panel-ammonet-storm</text:p>
          </table:table-cell>
          <table:table-cell office:value-type="string">
            <text:p>unsafe panel ammonet storm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kill-unsafe-panel-g16-storm</text:p>
          </table:table-cell>
          <table:table-cell office:value-type="string">
            <text:p>unsafe panel g16 storm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kill-unsafe-panel-gatekeeper-storm</text:p>
          </table:table-cell>
          <table:table-cell office:value-type="string">
            <text:p>unsafe panel gatekeeper storm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kill-unsafe-panel-internet-storm</text:p>
          </table:table-cell>
          <table:table-cell office:value-type="string">
            <text:p>unsafe panel internet storm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kill-unsafe-panel-lab-storm</text:p>
          </table:table-cell>
          <table:table-cell office:value-type="string">
            <text:p>unsafe panel lab storm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kill-unsafe-panel-protocol-storm</text:p>
          </table:table-cell>
          <table:table-cell office:value-type="string">
            <text:p>unsafe panel protocol storm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kill-unsafe-panel-qemu-storm</text:p>
          </table:table-cell>
          <table:table-cell office:value-type="string">
            <text:p>unsafe panel qemu storm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machine-speed exfiltration &amp; baseline mimicry</text:p>
          </table:table-cell>
          <table:table-cell office:value-type="string">
            <text:p>Machine-speed exfiltration &amp; baseline mimicry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THRE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-host egress baseline + gatekeeper bandwidth/stream axes</text:p>
          </table:table-cell>
        </table:table-row>
        <table:table-row>
          <table:table-cell office:value-type="string">
            <text:p>threat-microsoft-botnet-kill</text:p>
          </table:table-cell>
          <table:table-cell office:value-type="string">
            <text:p>microsoft botnet kill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stacked weak signals \\\\\\\\\\\\\\\\\\\\\\\\\\\\\\\\\\\\\\\\\\\\\\\\\\\\\\\\\\\\\\\\u2014 ml-managed c2</text:p>
          </table:table-cell>
          <table:table-cell office:value-type="string">
            <text:p>Stacked weak signals \\\\\\\\\\\\\\\\\\\\\\\\\\\\\\\\\\\\\\\\\\\\\\\\\\\\\\\\\\\\\\\\u2014 ML-managed C2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THRE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Correlation score + multi-vector same peer \\\\\\\\\\\\\\\\\\\\\\\\\\\\\\\\\\\\\\\\\\\\\\\\\\\\\\\\\\\\\\\\u2014 meta but actionable</text:p>
          </table:table-cell>
        </table:table-row>
        <table:table-row>
          <table:table-cell office:value-type="string">
            <text:p>threat-world-dns-dhcp-209-18-47-61</text:p>
          </table:table-cell>
          <table:table-cell office:value-type="string">
            <text:p>world dns dhcp 209 18 47 61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world-dns-dhcp-209-18-47-62</text:p>
          </table:table-cell>
          <table:table-cell office:value-type="string">
            <text:p>world dns dhcp 209 18 47 62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world-dns-dhcp-209-18-47-63</text:p>
          </table:table-cell>
          <table:table-cell office:value-type="string">
            <text:p>world dns dhcp 209 18 47 63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world-dns-dhcp-collision-guard</text:p>
          </table:table-cell>
          <table:table-cell office:value-type="string">
            <text:p>world dns dhcp collision guard</text:p>
          </table:table-cell>
          <table:table-cell office:value-type="string">
            <text:p>DEAD</text:p>
          </table:table-cell>
          <table:table-cell office:value-type="string">
            <text:p>critical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agent serve --hijack</text:p>
          </table:table-cell>
          <table:table-cell office:value-type="string">
            <text:p>agent serve --hijack</text:p>
          </table:table-cell>
          <table:table-cell office:value-type="string">
            <text:p>DEAD</text:p>
          </table:table-cell>
          <table:table-cell office:value-type="string">
            <text:p>high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permanent_list</text:p>
          </table:table-cell>
        </table:table-row>
        <table:table-row>
          <table:table-cell office:value-type="string">
            <text:p>threat-ai-scale phishing, vishing, synthetic identity</text:p>
          </table:table-cell>
          <table:table-cell office:value-type="string">
            <text:p>AI-scale phishing, vishing, synthetic identity</text:p>
          </table:table-cell>
          <table:table-cell office:value-type="string">
            <text:p>DEAD</text:p>
          </table:table-cell>
          <table:table-cell office:value-type="string">
            <text:p>high</text:p>
          </table:table-cell>
          <table:table-cell office:value-type="string">
            <text:p>THRE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Honorability + browser awareness + auth velocity \\\\\\\\\\\\\\\\\\\\\\\\\\\\\\\\\\\\\\\\\\\\\\\\\\\\\\\\\\\\\\\\u2014 not content ML alone</text:p>
          </table:table-cell>
        </table:table-row>
        <table:table-row>
          <table:table-cell office:value-type="string">
            <text:p>threat-ai_phish_fraud</text:p>
          </table:table-cell>
          <table:table-cell office:value-type="string">
            <text:p>AI-scale phishing, vishing, synthetic identity</text:p>
          </table:table-cell>
          <table:table-cell office:value-type="string">
            <text:p>DEAD</text:p>
          </table:table-cell>
          <table:table-cell office:value-type="string">
            <text:p>high</text:p>
          </table:table-cell>
          <table:table-cell office:value-type="string">
            <text:p>THRE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Sever wire \\\\\\\\\\\\\\\\\\\\\\\\\\\\\\\\\\\\\\\\\\\\\\\\\\\\\\\\\\\\\\\\u00b7 block fraud egress</text:p>
          </table:table-cell>
        </table:table-row>
        <table:table-row>
          <table:table-cell office:value-type="string">
            <text:p>threat-ammonet-field.py panel</text:p>
          </table:table-cell>
          <table:table-cell office:value-type="string">
            <text:p>ammonet-field.py panel</text:p>
          </table:table-cell>
          <table:table-cell office:value-type="string">
            <text:p>DEAD</text:p>
          </table:table-cell>
          <table:table-cell office:value-type="string">
            <text:p>high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Orphan panel JSON subprocesses and duplicate publish queues burn CPU when C2 is down. Purge kills them; Big Grin Pwnership records why. Never remove from kill l</text:p>
          </table:table-cell>
        </table:table-row>
        <table:table-row>
          <table:table-cell office:value-type="string">
            <text:p>threat-awaitshell</text:p>
          </table:table-cell>
          <table:table-cell office:value-type="string">
            <text:p>AwaitShell</text:p>
          </table:table-cell>
          <table:table-cell office:value-type="string">
            <text:p>DEAD</text:p>
          </table:table-cell>
          <table:table-cell office:value-type="string">
            <text:p>high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Orphan panel JSON subprocesses and duplicate publish queues burn CPU when C2 is down. Purge kills them; Big Grin Pwnership records why. Never remove from kill l</text:p>
          </table:table-cell>
        </table:table-row>
        <table:table-row>
          <table:table-cell office:value-type="string">
            <text:p>threat-block_until_ms</text:p>
          </table:table-cell>
          <table:table-cell office:value-type="string">
            <text:p>block_until_ms</text:p>
          </table:table-cell>
          <table:table-cell office:value-type="string">
            <text:p>DEAD</text:p>
          </table:table-cell>
          <table:table-cell office:value-type="string">
            <text:p>high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Orphan panel JSON subprocesses and duplicate publish queues burn CPU when C2 is down. Purge kills them; Big Grin Pwnership records why. Never remove from kill l</text:p>
          </table:table-cell>
        </table:table-row>
        <table:table-row>
          <table:table-cell office:value-type="string">
            <text:p>threat-boot-simulate.sh</text:p>
          </table:table-cell>
          <table:table-cell office:value-type="string">
            <text:p>boot-simulate.sh</text:p>
          </table:table-cell>
          <table:table-cell office:value-type="string">
            <text:p>DEAD</text:p>
          </table:table-cell>
          <table:table-cell office:value-type="string">
            <text:p>high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Orphan panel JSON subprocesses and duplicate publish queues burn CPU when C2 is down. Purge kills them; Big Grin Pwnership records why. Never remove from kill l</text:p>
          </table:table-cell>
        </table:table-row>
        <table:table-row>
          <table:table-cell office:value-type="string">
            <text:p>threat-browser-awareness.py json</text:p>
          </table:table-cell>
          <table:table-cell office:value-type="string">
            <text:p>browser-awareness.py json</text:p>
          </table:table-cell>
          <table:table-cell office:value-type="string">
            <text:p>DEAD</text:p>
          </table:table-cell>
          <table:table-cell office:value-type="string">
            <text:p>high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Orphan panel JSON subprocesses and duplicate publish queues burn CPU when C2 is down. Purge kills them; Big Grin Pwnership records why. Never remove from kill l</text:p>
          </table:table-cell>
        </table:table-row>
        <table:table-row>
          <table:table-cell office:value-type="string">
            <text:p>threat-collision guard \\\\\\\\\\\\\\\\\\\\\\\\\\\\\\\\\\\\\\\\\\\\\\\\\\\\\\\\\\\\\\\\u2014 7 foreign hooks, 0 eradicated on sight</text:p>
          </table:table-cell>
          <table:table-cell office:value-type="string">
            <text:p>Collision guard \\\\\\\\\\\\\\\\\\\\\\\\\\\\\\\\\\\\\\\\\\\\\\\\\\\\\\\\\\\\\\\\u2014 7 foreign hooks, 0 eradicated on sight</text:p>
          </table:table-cell>
          <table:table-cell office:value-type="string">
            <text:p>DEAD</text:p>
          </table:table-cell>
          <table:table-cell office:value-type="string">
            <text:p>high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ISP CPE resolvers, foreign DHCP OFFERs, and rogue listeners that try to hijack planetary DNS/DHCP authority get permanent blocks, nft drops, and SIGKILL. No qua</text:p>
          </table:table-cell>
        </table:table-row>
        <table:table-row>
          <table:table-cell office:value-type="string">
            <text:p>threat-connection-gatekeeper.py</text:p>
          </table:table-cell>
          <table:table-cell office:value-type="string">
            <text:p>connection-gatekeeper.py</text:p>
          </table:table-cell>
          <table:table-cell office:value-type="string">
            <text:p>DEAD</text:p>
          </table:table-cell>
          <table:table-cell office:value-type="string">
            <text:p>high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Orphan panel JSON subprocesses and duplicate publish queues burn CPU when C2 is down. Purge kills them; Big Grin Pwnership records why. Never remove from kill l</text:p>
          </table:table-cell>
        </table:table-row>
        <table:table-row>
          <table:table-cell office:value-type="string">
            <text:p>threat-dig @127.0.0.1</text:p>
          </table:table-cell>
          <table:table-cell office:value-type="string">
            <text:p>dig @127.0.0.1</text:p>
          </table:table-cell>
          <table:table-cell office:value-type="string">
            <text:p>DEAD</text:p>
          </table:table-cell>
          <table:table-cell office:value-type="string">
            <text:p>high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Orphan panel JSON subprocesses and duplicate publish queues burn CPU when C2 is down. Purge kills them; Big Grin Pwnership records why. Never remove from kill l</text:p>
          </table:table-cell>
        </table:table-row>
        <table:table-row>
          <table:table-cell office:value-type="string">
            <text:p>threat-duplicate grok agent serve spawner</text:p>
          </table:table-cell>
          <table:table-cell office:value-type="string">
            <text:p>Duplicate grok agent serve spawner</text:p>
          </table:table-cell>
          <table:table-cell office:value-type="string">
            <text:p>DEAD</text:p>
          </table:table-cell>
          <table:table-cell office:value-type="string">
            <text:p>high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dump_bash_state piles, GROK_AGENT shells, sleep infinity, subagent storms, and panel subprocess duplicates get SIGKILL. GrokSpawnKiller never sleeps \\\\\\\\\\\\\\\\\\\\\\\\\\\\\\\\\\\\\\\\\\\\\\\\\\\\\\\\\\\\\\\\u2014 every kil</text:p>
          </table:table-cell>
        </table:table-row>
        <table:table-row>
          <table:table-cell office:value-type="string">
            <text:p>threat-duplicate grok agent stdio spawner</text:p>
          </table:table-cell>
          <table:table-cell office:value-type="string">
            <text:p>Duplicate grok agent stdio spawner</text:p>
          </table:table-cell>
          <table:table-cell office:value-type="string">
            <text:p>DEAD</text:p>
          </table:table-cell>
          <table:table-cell office:value-type="string">
            <text:p>high</text:p>
          </table:table-cell>
          <table:table-cell office:value-type="string">
            <text:p>DOGSH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ALATE_REKILL · DEAD_DEAD · rekill+3 · cycle 1 · dump_bash_state piles, GROK_AGENT shells, sleep infinity, subagent storms, and panel subprocess duplicates get SIGKILL. GrokSpawnKiller never sleeps \\\\\\\\\\\\\\\\\\\\\\\\\\\\\\\\\\\\\\\\\\\\\\\\\\\\\\\\\\\\\\\\u2014 every kil</text:p>
          </table:table-cell>
        </table:table-row>
      </table:table>
      <table:table table:name="Copilot">
        <table:table-row>
          <table:table-cell office:value-type="string">
            <text:p>id</text:p>
          </table:table-cell>
          <table:table-cell office:value-type="string">
            <text:p>label</text:p>
          </table:table-cell>
          <table:table-cell office:value-type="string">
            <text:p>vector</text:p>
          </table:table-cell>
          <table:table-cell office:value-type="string">
            <text:p>rekill_count</text:p>
          </table:table-cell>
          <table:table-cell office:value-type="string">
            <text:p>last_rekill_at</text:p>
          </table:table-cell>
          <table:table-cell office:value-type="string">
            <text:p>status</text:p>
          </table:table-cell>
        </table:table-row>
        <table:table-row>
          <table:table-cell office:value-type="string">
            <text:p>global-copilot</text:p>
          </table:table-cell>
          <table:table-cell office:value-type="string">
            <text:p>Copilot · GLOBAL STAGE</text:p>
          </table:table-cell>
          <table:table-cell office:value-type="string">
            <text:p>COPILOT_GLOBAL</text:p>
          </table:table-cell>
          <table:table-cell office:value-type="string">
            <text:p>7193</text:p>
          </table:table-cell>
          <table:table-cell office:value-type="string">
            <text:p>2026-07-14T00:16Z</text:p>
          </table:table-cell>
          <table:table-cell office:value-type="string">
            <text:p>LETHAL_DESTROYED</text:p>
          </table:table-cell>
        </table:table-row>
      </table:table>
      <table:table table:name="Infra">
        <table:table-row>
          <table:table-cell office:value-type="string">
            <text:p>key</text:p>
          </table:table-cell>
          <table:table-cell office:value-type="string">
            <text:p>value</text:p>
          </table:table-cell>
        </table:table-row>
        <table:table-row>
          <table:table-cell office:value-type="string">
            <text:p>angel_status</text:p>
          </table:table-cell>
          <table:table-cell office:value-type="string">
            <text:p>SEALED_UP</text:p>
          </table:table-cell>
        </table:table-row>
        <table:table-row>
          <table:table-cell office:value-type="string">
            <text:p>angel_commander</text:p>
          </table:table-cell>
          <table:table-cell office:value-type="string">
            <text:p>Forever Watchguard Angel</text:p>
          </table:table-cell>
        </table:table-row>
        <table:table-row>
          <table:table-cell office:value-type="string">
            <text:p>dns_status</text:p>
          </table:table-cell>
          <table:table-cell office:value-type="string">
            <text:p>UP</text:p>
          </table:table-cell>
        </table:table-row>
        <table:table-row>
          <table:table-cell office:value-type="string">
            <text:p>dns_policy</text:p>
          </table:table-cell>
          <table:table-cell office:value-type="string">
            <text:p>foreign_world_dns_hooks BLOCKED · local truth · field sole authority</text:p>
          </table:table-cell>
        </table:table-row>
        <table:table-row>
          <table:table-cell office:value-type="string">
            <text:p>monitor_overall</text:p>
          </table:table-cell>
          <table:table-cell office:value-type="string">
            <text:p>CLEAR</text:p>
          </table:table-cell>
        </table:table-row>
      </table:table>
    </office:spreadsheet>
  </office:body>
</office:document-content>
</file>