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tatus">
        <table:table-row>
          <table:table-cell office:value-type="string">
            <text:p>field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s</text:p>
          </table:table-cell>
          <table:table-cell office:value-type="string">
            <text:p>2026-07-13T21:53Z</text:p>
          </table:table-cell>
        </table:table-row>
        <table:table-row>
          <table:table-cell office:value-type="string">
            <text:p>stack</text:p>
          </table:table-cell>
          <table:table-cell office:value-type="string">
            <text:p>C++</text:p>
          </table:table-cell>
        </table:table-row>
        <table:table-row>
          <table:table-cell office:value-type="string">
            <text:p>scripts</text:p>
          </table:table-cell>
          <table:table-cell office:value-type="string">
            <text:p>FORBIDDEN</text:p>
          </table:table-cell>
        </table:table-row>
        <table:table-row>
          <table:table-cell office:value-type="string">
            <text:p>stage</text:p>
          </table:table-cell>
          <table:table-cell office:value-type="string">
            <text:p>GLOBAL</text:p>
          </table:table-cell>
        </table:table-row>
        <table:table-row>
          <table:table-cell office:value-type="string">
            <text:p>blessing</text:p>
          </table:table-cell>
          <table:table-cell office:value-type="string">
            <text:p>God Bless</text:p>
          </table:table-cell>
        </table:table-row>
        <table:table-row>
          <table:table-cell office:value-type="string">
            <text:p>motto</text:p>
          </table:table-cell>
          <table:table-cell office:value-type="string">
            <text:p>WAR DAY · REAL hunt · LETHAL KILL/REKILL · no demo · no fake · God Bless.</text:p>
          </table:table-cell>
        </table:table-row>
        <table:table-row>
          <table:table-cell office:value-type="string">
            <text:p>planet_defending</text:p>
          </table:table-cell>
          <table:table-cell office:value-type="string">
            <text:p>2154000</text:p>
          </table:table-cell>
        </table:table-row>
        <table:table-row>
          <table:table-cell office:value-type="string">
            <text:p>planet_areas</text:p>
          </table:table-cell>
          <table:table-cell office:value-type="string">
            <text:p>359</text:p>
          </table:table-cell>
        </table:table-row>
        <table:table-row>
          <table:table-cell office:value-type="string">
            <text:p>copilot_lifetime_rekills</text:p>
          </table:table-cell>
          <table:table-cell office:value-type="string">
            <text:p>3773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dns</text:p>
          </table:table-cell>
          <table:table-cell office:value-type="string">
            <text:p>UP</text:p>
          </table:table-cell>
        </table:table-row>
      </table:table>
      <table:table table:name="Fleet">
        <table:table-row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zone</text:p>
          </table:table-cell>
          <table:table-cell office:value-type="string">
            <text:p>racks</text:p>
          </table:table-cell>
          <table:table-cell office:value-type="string">
            <text:p>online</text:p>
          </table:table-cell>
          <table:table-cell office:value-type="string">
            <text:p>status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Banglades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W</text:p>
          </table:table-cell>
          <table:table-cell office:value-type="string">
            <text:p>Botsw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N</text:p>
          </table:table-cell>
          <table:table-cell office:value-type="string">
            <text:p>Brun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V</text:p>
          </table:table-cell>
          <table:table-cell office:value-type="string">
            <text:p>Cabo Verd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</text:p>
          </table:table-cell>
          <table:table-cell office:value-type="string">
            <text:p>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D</text:p>
          </table:table-cell>
          <table:table-cell office:value-type="string">
            <text:p>DR 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I</text:p>
          </table:table-cell>
          <table:table-cell office:value-type="string">
            <text:p>C\u00f4te d'Ivoir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U</text:p>
          </table:table-cell>
          <table:table-cell office:value-type="string">
            <text:p>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Z</text:p>
          </table:table-cell>
          <table:table-cell office:value-type="string">
            <text:p>Czec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J</text:p>
          </table:table-cell>
          <table:table-cell office:value-type="string">
            <text:p>Djibout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Z</text:p>
          </table:table-cell>
          <table:table-cell office:value-type="string">
            <text:p>Eswatin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Gab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Ken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Lao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Madagasca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V</text:p>
          </table:table-cell>
          <table:table-cell office:value-type="string">
            <text:p>Maldiv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Z</text:p>
          </table:table-cell>
          <table:table-cell office:value-type="string">
            <text:p>Mozambiqu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M</text:p>
          </table:table-cell>
          <table:table-cell office:value-type="string">
            <text:p>Myanm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K</text:p>
          </table:table-cell>
          <table:table-cell office:value-type="string">
            <text:p>North Maced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H</text:p>
          </table:table-cell>
          <table:table-cell office:value-type="string">
            <text:p>Philippin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A</text:p>
          </table:table-cell>
          <table:table-cell office:value-type="string">
            <text:p>Q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W</text:p>
          </table:table-cell>
          <table:table-cell office:value-type="string">
            <text:p>Rw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</text:p>
          </table:table-cell>
          <table:table-cell office:value-type="string">
            <text:p>Seychelle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</text:p>
          </table:table-cell>
          <table:table-cell office:value-type="string">
            <text:p>Timor-Lest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</text:p>
          </table:table-cell>
          <table:table-cell office:value-type="string">
            <text:p>T\u00fcrkiy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A</text:p>
          </table:table-cell>
          <table:table-cell office:value-type="string">
            <text:p>Ukrain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A</text:p>
          </table:table-cell>
          <table:table-cell office:value-type="string">
            <text:p>Vatica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W</text:p>
          </table:table-cell>
          <table:table-cell office:value-type="string">
            <text:p>Zimbabw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</text:p>
          </table:table-cell>
          <table:table-cell office:value-type="string">
            <text:p>Puerto Ric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</text:p>
          </table:table-cell>
          <table:table-cell office:value-type="string">
            <text:p>U.S. Virgin Island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P</text:p>
          </table:table-cell>
          <table:table-cell office:value-type="string">
            <text:p>Michigan Upper Peninsul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</text:p>
          </table:table-cell>
          <table:table-cell office:value-type="string">
            <text:p>Mac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XK</text:p>
          </table:table-cell>
          <table:table-cell office:value-type="string">
            <text:p>Kosov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W</text:p>
          </table:table-cell>
          <table:table-cell office:value-type="string">
            <text:p>Moscow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ED</text:p>
          </table:table-cell>
          <table:table-cell office:value-type="string">
            <text:p>Saint Peters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VB</text:p>
          </table:table-cell>
          <table:table-cell office:value-type="string">
            <text:p>Novosibi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VO</text:p>
          </table:table-cell>
          <table:table-cell office:value-type="string">
            <text:p>Vladivosto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V</text:p>
          </table:table-cell>
          <table:table-cell office:value-type="string">
            <text:p>Ky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WO</text:p>
          </table:table-cell>
          <table:table-cell office:value-type="string">
            <text:p>Lv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DS</text:p>
          </table:table-cell>
          <table:table-cell office:value-type="string">
            <text:p>Odes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K</text:p>
          </table:table-cell>
          <table:table-cell office:value-type="string">
            <text:p>Khark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V</text:p>
          </table:table-cell>
          <table:table-cell office:value-type="string">
            <text:p>Tel Aviv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RS</text:p>
          </table:table-cell>
          <table:table-cell office:value-type="string">
            <text:p>Jerusale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FA</text:p>
          </table:table-cell>
          <table:table-cell office:value-type="string">
            <text:p>Haif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R</text:p>
          </table:table-cell>
          <table:table-cell office:value-type="string">
            <text:p>Teh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FN</text:p>
          </table:table-cell>
          <table:table-cell office:value-type="string">
            <text:p>Isfah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D</text:p>
          </table:table-cell>
          <table:table-cell office:value-type="string">
            <text:p>Mashha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AW</text:p>
          </table:table-cell>
          <table:table-cell office:value-type="string">
            <text:p>Wars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K</text:p>
          </table:table-cell>
          <table:table-cell office:value-type="string">
            <text:p>Krako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N</text:p>
          </table:table-cell>
          <table:table-cell office:value-type="string">
            <text:p>Gdans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PE</text:p>
          </table:table-cell>
          <table:table-cell office:value-type="string">
            <text:p>Taip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H</text:p>
          </table:table-cell>
          <table:table-cell office:value-type="string">
            <text:p>Kaohsi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XG</text:p>
          </table:table-cell>
          <table:table-cell office:value-type="string">
            <text:p>Taich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N</text:p>
          </table:table-cell>
          <table:table-cell office:value-type="string">
            <text:p>Hano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N</text:p>
          </table:table-cell>
          <table:table-cell office:value-type="string">
            <text:p>Ho Chi Min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D</text:p>
          </table:table-cell>
          <table:table-cell office:value-type="string">
            <text:p>Da Na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L</text:p>
          </table:table-cell>
          <table:table-cell office:value-type="string">
            <text:p>Manil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EB</text:p>
          </table:table-cell>
          <table:table-cell office:value-type="string">
            <text:p>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VO</text:p>
          </table:table-cell>
          <table:table-cell office:value-type="string">
            <text:p>Dav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YC</text:p>
          </table:table-cell>
          <table:table-cell office:value-type="string">
            <text:p>New York Cit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X</text:p>
          </table:table-cell>
          <table:table-cell office:value-type="string">
            <text:p>Los Angel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I</text:p>
          </table:table-cell>
          <table:table-cell office:value-type="string">
            <text:p>Chicag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N</text:p>
          </table:table-cell>
          <table:table-cell office:value-type="string">
            <text:p>Londo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R</text:p>
          </table:table-cell>
          <table:table-cell office:value-type="string">
            <text:p>Pari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R</text:p>
          </table:table-cell>
          <table:table-cell office:value-type="string">
            <text:p>Berli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YO</text:p>
          </table:table-cell>
          <table:table-cell office:value-type="string">
            <text:p>Tokyo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HA</text:p>
          </table:table-cell>
          <table:table-cell office:value-type="string">
            <text:p>Shangh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K</text:p>
          </table:table-cell>
          <table:table-cell office:value-type="string">
            <text:p>Beijing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L</text:p>
          </table:table-cell>
          <table:table-cell office:value-type="string">
            <text:p>Delhi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M</text:p>
          </table:table-cell>
          <table:table-cell office:value-type="string">
            <text:p>Mum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D</text:p>
          </table:table-cell>
          <table:table-cell office:value-type="string">
            <text:p>Sydne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O</text:p>
          </table:table-cell>
          <table:table-cell office:value-type="string">
            <text:p>Sao Paul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X</text:p>
          </table:table-cell>
          <table:table-cell office:value-type="string">
            <text:p>Mexico City Metr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I</text:p>
          </table:table-cell>
          <table:table-cell office:value-type="string">
            <text:p>Cairo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NB</text:p>
          </table:table-cell>
          <table:table-cell office:value-type="string">
            <text:p>Johannesburg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G</text:p>
          </table:table-cell>
          <table:table-cell office:value-type="string">
            <text:p>Lag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T</text:p>
          </table:table-cell>
          <table:table-cell office:value-type="string">
            <text:p>Istanbu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XB</text:p>
          </table:table-cell>
          <table:table-cell office:value-type="string">
            <text:p>Du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N</text:p>
          </table:table-cell>
          <table:table-cell office:value-type="string">
            <text:p>Singapore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L</text:p>
          </table:table-cell>
          <table:table-cell office:value-type="string">
            <text:p>Seoul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KK</text:p>
          </table:table-cell>
          <table:table-cell office:value-type="string">
            <text:p>Bangkok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V</text:p>
          </table:table-cell>
          <table:table-cell office:value-type="string">
            <text:p>Havana City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Kaliningra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X</text:p>
          </table:table-cell>
          <table:table-cell office:value-type="string">
            <text:p>Yekaterin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JA</text:p>
          </table:table-cell>
          <table:table-cell office:value-type="string">
            <text:p>Krasnoya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V</text:p>
          </table:table-cell>
          <table:table-cell office:value-type="string">
            <text:p>Rostov-on-D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NK</text:p>
          </table:table-cell>
          <table:table-cell office:value-type="string">
            <text:p>Dnip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N</text:p>
          </table:table-cell>
          <table:table-cell office:value-type="string">
            <text:p>Vinnyts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PR</text:p>
          </table:table-cell>
          <table:table-cell office:value-type="string">
            <text:p>Zaporizhz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Y</text:p>
          </table:table-cell>
          <table:table-cell office:value-type="string">
            <text:p>Beiru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M</text:p>
          </table:table-cell>
          <table:table-cell office:value-type="string">
            <text:p>Am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M</text:p>
          </table:table-cell>
          <table:table-cell office:value-type="string">
            <text:p>Damascu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W</text:p>
          </table:table-cell>
          <table:table-cell office:value-type="string">
            <text:p>Baghdad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H</text:p>
          </table:table-cell>
          <table:table-cell office:value-type="string">
            <text:p>Doh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H</text:p>
          </table:table-cell>
          <table:table-cell office:value-type="string">
            <text:p>Riyad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ED</text:p>
          </table:table-cell>
          <table:table-cell office:value-type="string">
            <text:p>Jedda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I</text:p>
          </table:table-cell>
          <table:table-cell office:value-type="string">
            <text:p>Karach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HE</text:p>
          </table:table-cell>
          <table:table-cell office:value-type="string">
            <text:p>Lah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C</text:p>
          </table:table-cell>
          <table:table-cell office:value-type="string">
            <text:p>Dhak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CU</text:p>
          </table:table-cell>
          <table:table-cell office:value-type="string">
            <text:p>Kolkat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LR</text:p>
          </table:table-cell>
          <table:table-cell office:value-type="string">
            <text:p>Bengalur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A</text:p>
          </table:table-cell>
          <table:table-cell office:value-type="string">
            <text:p>Chenn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K</text:p>
          </table:table-cell>
          <table:table-cell office:value-type="string">
            <text:p>Jakart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UB</text:p>
          </table:table-cell>
          <table:table-cell office:value-type="string">
            <text:p>Surabay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ZN</text:p>
          </table:table-cell>
          <table:table-cell office:value-type="string">
            <text:p>Quezon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T</text:p>
          </table:table-cell>
          <table:table-cell office:value-type="string">
            <text:p>Mactan 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QC</text:p>
          </table:table-cell>
          <table:table-cell office:value-type="string">
            <text:p>Phu Quoc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I</text:p>
          </table:table-cell>
          <table:table-cell office:value-type="string">
            <text:p>Hu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T</text:p>
          </table:table-cell>
          <table:table-cell office:value-type="string">
            <text:p>Narita Corrido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A</text:p>
          </table:table-cell>
          <table:table-cell office:value-type="string">
            <text:p>Osa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UK</text:p>
          </table:table-cell>
          <table:table-cell office:value-type="string">
            <text:p>Fukuo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CN</text:p>
          </table:table-cell>
          <table:table-cell office:value-type="string">
            <text:p>Inche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US</text:p>
          </table:table-cell>
          <table:table-cell office:value-type="string">
            <text:p>Bus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N</text:p>
          </table:table-cell>
          <table:table-cell office:value-type="string">
            <text:p>Tain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L</text:p>
          </table:table-cell>
          <table:table-cell office:value-type="string">
            <text:p>Honolu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NC</text:p>
          </table:table-cell>
          <table:table-cell office:value-type="string">
            <text:p>Anchorag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VR</text:p>
          </table:table-cell>
          <table:table-cell office:value-type="string">
            <text:p>Vancou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YZ</text:p>
          </table:table-cell>
          <table:table-cell office:value-type="string">
            <text:p>Toront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UL</text:p>
          </table:table-cell>
          <table:table-cell office:value-type="string">
            <text:p>Montreal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A</text:p>
          </table:table-cell>
          <table:table-cell office:value-type="string">
            <text:p>Miam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A</text:p>
          </table:table-cell>
          <table:table-cell office:value-type="string">
            <text:p>Seattl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N</text:p>
          </table:table-cell>
          <table:table-cell office:value-type="string">
            <text:p>Den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L</text:p>
          </table:table-cell>
          <table:table-cell office:value-type="string">
            <text:p>Atlant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FW</text:p>
          </table:table-cell>
          <table:table-cell office:value-type="string">
            <text:p>Dalla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G</text:p>
          </table:table-cell>
          <table:table-cell office:value-type="string">
            <text:p>Bogot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M</text:p>
          </table:table-cell>
          <table:table-cell office:value-type="string">
            <text:p>Lim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L</text:p>
          </table:table-cell>
          <table:table-cell office:value-type="string">
            <text:p>Santiago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ZE</text:p>
          </table:table-cell>
          <table:table-cell office:value-type="string">
            <text:p>Buenos Aires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IG</text:p>
          </table:table-cell>
          <table:table-cell office:value-type="string">
            <text:p>Rio de Janeir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PT</text:p>
          </table:table-cell>
          <table:table-cell office:value-type="string">
            <text:p>Cape Tow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BO</text:p>
          </table:table-cell>
          <table:table-cell office:value-type="string">
            <text:p>Nairobi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Accr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D</text:p>
          </table:table-cell>
          <table:table-cell office:value-type="string">
            <text:p>Addis Ababa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S</text:p>
          </table:table-cell>
          <table:table-cell office:value-type="string">
            <text:p>Casablan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G</text:p>
          </table:table-cell>
          <table:table-cell office:value-type="string">
            <text:p>Algier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UN</text:p>
          </table:table-cell>
          <table:table-cell office:value-type="string">
            <text:p>Tuni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H</text:p>
          </table:table-cell>
          <table:table-cell office:value-type="string">
            <text:p>Athen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D</text:p>
          </table:table-cell>
          <table:table-cell office:value-type="string">
            <text:p>Madrid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CN</text:p>
          </table:table-cell>
          <table:table-cell office:value-type="string">
            <text:p>Barcelo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M</text:p>
          </table:table-cell>
          <table:table-cell office:value-type="string">
            <text:p>Rom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L</text:p>
          </table:table-cell>
          <table:table-cell office:value-type="string">
            <text:p>Mila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E</text:p>
          </table:table-cell>
          <table:table-cell office:value-type="string">
            <text:p>Vienna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G</text:p>
          </table:table-cell>
          <table:table-cell office:value-type="string">
            <text:p>Pragu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D</text:p>
          </table:table-cell>
          <table:table-cell office:value-type="string">
            <text:p>Lodz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RO</text:p>
          </table:table-cell>
          <table:table-cell office:value-type="string">
            <text:p>Wrocl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EL</text:p>
          </table:table-cell>
          <table:table-cell office:value-type="string">
            <text:p>Helsinki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O</text:p>
          </table:table-cell>
          <table:table-cell office:value-type="string">
            <text:p>Stockholm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L</text:p>
          </table:table-cell>
          <table:table-cell office:value-type="string">
            <text:p>Oslo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EK</text:p>
          </table:table-cell>
          <table:table-cell office:value-type="string">
            <text:p>Reykjavi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L</text:p>
          </table:table-cell>
          <table:table-cell office:value-type="string">
            <text:p>Tallin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IX</text:p>
          </table:table-cell>
          <table:table-cell office:value-type="string">
            <text:p>Rig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O</text:p>
          </table:table-cell>
          <table:table-cell office:value-type="string">
            <text:p>Vilni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V</text:p>
          </table:table-cell>
          <table:table-cell office:value-type="string">
            <text:p>Chisinau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BS</text:p>
          </table:table-cell>
          <table:table-cell office:value-type="string">
            <text:p>Tbilis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VN</text:p>
          </table:table-cell>
          <table:table-cell office:value-type="string">
            <text:p>Yerev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K</text:p>
          </table:table-cell>
          <table:table-cell office:value-type="string">
            <text:p>Bak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A</text:p>
          </table:table-cell>
          <table:table-cell office:value-type="string">
            <text:p>Alma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AS</text:p>
          </table:table-cell>
          <table:table-cell office:value-type="string">
            <text:p>Tashken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LN</text:p>
          </table:table-cell>
          <table:table-cell office:value-type="string">
            <text:p>Ulaanba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NH</text:p>
          </table:table-cell>
          <table:table-cell office:value-type="string">
            <text:p>Phnom Pen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GN</text:p>
          </table:table-cell>
          <table:table-cell office:value-type="string">
            <text:p>Yang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TE</text:p>
          </table:table-cell>
          <table:table-cell office:value-type="string">
            <text:p>Vientia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B</text:p>
          </table:table-cell>
          <table:table-cell office:value-type="string">
            <text:p>Colomb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TM</text:p>
          </table:table-cell>
          <table:table-cell office:value-type="string">
            <text:p>Kathmand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L</text:p>
          </table:table-cell>
          <table:table-cell office:value-type="string">
            <text:p>Melbourn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KL</text:p>
          </table:table-cell>
          <table:table-cell office:value-type="string">
            <text:p>Auck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PT</text:p>
          </table:table-cell>
          <table:table-cell office:value-type="string">
            <text:p>Papeet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M</text:p>
          </table:table-cell>
          <table:table-cell office:value-type="string">
            <text:p>Hagatna 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PN</text:p>
          </table:table-cell>
          <table:table-cell office:value-type="string">
            <text:p>Saipan Cit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JU</text:p>
          </table:table-cell>
          <table:table-cell office:value-type="string">
            <text:p>San Juan PR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OS</text:p>
          </table:table-cell>
          <table:table-cell office:value-type="string">
            <text:p>Port of Spain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N</text:p>
          </table:table-cell>
          <table:table-cell office:value-type="string">
            <text:p>Kingston JM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P</text:p>
          </table:table-cell>
          <table:table-cell office:value-type="string">
            <text:p>Port-au-Prince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U</text:p>
          </table:table-cell>
          <table:table-cell office:value-type="string">
            <text:p>Santiago de 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UK</text:p>
          </table:table-cell>
          <table:table-cell office:value-type="string">
            <text:p>Nuuk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AI</text:p>
          </table:table-cell>
          <table:table-cell office:value-type="string">
            <text:p>Fairbank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FB</text:p>
          </table:table-cell>
          <table:table-cell office:value-type="string">
            <text:p>Iqaluit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D</text:p>
          </table:table-cell>
          <table:table-cell office:value-type="string">
            <text:p>Troms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R</text:p>
          </table:table-cell>
          <table:table-cell office:value-type="string">
            <text:p>Longyearby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H</text:p>
          </table:table-cell>
          <table:table-cell office:value-type="string">
            <text:p>Ushua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MC</text:p>
          </table:table-cell>
          <table:table-cell office:value-type="string">
            <text:p>Puerto Montt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QT</text:p>
          </table:table-cell>
          <table:table-cell office:value-type="string">
            <text:p>Marquette UP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C</text:p>
          </table:table-cell>
          <table:table-cell office:value-type="string">
            <text:p>Escanab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B</text:p>
          </table:table-cell>
          <table:table-cell office:value-type="string">
            <text:p>Green Ba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Madison W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</table:table>
      <table:table table:name="Threats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detail</text:p>
          </table:table-cell>
        </table:table-row>
      </table:table>
      <table:table table:name="Kills">
        <table:table-row>
          <table:table-cell office:value-type="string">
            <text:p>id</text:p>
          </table:table-cell>
          <table:table-cell office:value-type="string">
            <text:p>target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isp</text:p>
          </table:table-cell>
          <table:table-cell office:value-type="string">
            <text:p>reason</text:p>
          </table:table-cell>
        </table:table-row>
        <table:table-row>
          <table:table-cell office:value-type="string">
            <text:p>threat-copilot-ironclad-fail</text:p>
          </table:table-cell>
          <table:table-cell office:value-type="string">
            <text:p>Copilo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COPILOT_FORE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onclad_mesh_fail \u00b7 hostess7_not_meshed \u00b7 liar_risk \u00b7 destroy_all</text:p>
          </table:table-cell>
        </table:table-row>
        <table:table-row>
          <table:table-cell office:value-type="string">
            <text:p>threat-hotdog-down-a-hallway</text:p>
          </table:table-cell>
          <table:table-cell office:value-type="string">
            <text:p>Hotdog down a Hallway</text:p>
          </table:table-cell>
          <table:table-cell office:value-type="string">
            <text:p>OUSTED</text:p>
          </table:table-cell>
          <table:table-cell office:value-type="string">
            <text:p>critical</text:p>
          </table:table-cell>
          <table:table-cell office:value-type="string">
            <text:p>HOTDOG_HALLW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rrorist_hacker_kit \u00b7 permanent_oust</text:p>
          </table:table-cell>
        </table:table-row>
        <table:table-row>
          <table:table-cell office:value-type="string">
            <text:p>kill-101-43-32-212</text:p>
          </table:table-cell>
          <table:table-cell office:value-type="string">
            <text:p>101.43.32.2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02-220-160-222</text:p>
          </table:table-cell>
          <table:table-cell office:value-type="string">
            <text:p>102.220.160.22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7.78267</text:p>
          </table:table-cell>
          <table:table-cell office:value-type="string">
            <text:p>4.54181</text:p>
          </table:table-cell>
          <table:table-cell office:value-type="string">
            <text:p>Osogbo</text:p>
          </table:table-cell>
          <table:table-cell office:value-type="string">
            <text:p>Nigeria</text:p>
          </table:table-cell>
          <table:table-cell office:value-type="string">
            <text:p>ABINTERNET-V Ltd.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13-45-226-61</text:p>
          </table:table-cell>
          <table:table-cell office:value-type="string">
            <text:p>113.45.226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18-25-85-198</text:p>
          </table:table-cell>
          <table:table-cell office:value-type="string">
            <text:p>118.25.85.198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21-4-76-54</text:p>
          </table:table-cell>
          <table:table-cell office:value-type="string">
            <text:p>121.4.76.5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a Internet Network Information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39-159-203-44</text:p>
          </table:table-cell>
          <table:table-cell office:value-type="string">
            <text:p>139.159.203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46-75-92-159</text:p>
          </table:table-cell>
          <table:table-cell office:value-type="string">
            <text:p>146.75.92.159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4.0544</text:p>
          </table:table-cell>
          <table:table-cell office:value-type="string">
            <text:p>-118.244</text:p>
          </table:table-cell>
          <table:table-cell office:value-type="string">
            <text:p>Los Angeles</text:p>
          </table:table-cell>
          <table:table-cell office:value-type="string">
            <text:p>United States</text:p>
          </table:table-cell>
          <table:table-cell office:value-type="string">
            <text:p>Fastly, Inc.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47-93-191-75</text:p>
          </table:table-cell>
          <table:table-cell office:value-type="string">
            <text:p>147.93.191.7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1.0446</text:p>
          </table:table-cell>
          <table:table-cell office:value-type="string">
            <text:p>-73.9592</text:p>
          </table:table-cell>
          <table:table-cell office:value-type="string">
            <text:p>Orangeburg</text:p>
          </table:table-cell>
          <table:table-cell office:value-type="string">
            <text:p>United States</text:p>
          </table:table-cell>
          <table:table-cell office:value-type="string">
            <text:p>Contabo Inc.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62-159-140-229</text:p>
          </table:table-cell>
          <table:table-cell office:value-type="string">
            <text:p>162.159.140.229</text:p>
          </table:table-cell>
          <table:table-cell office:value-type="string">
            <text:p>DEAD</text:p>
          </table:table-cell>
          <table:table-cell office:value-type="string">
            <text:p>medium</text:p>
          </table:table-cell>
          <table:table-cell office:value-type="string">
            <text:p>BEACON_PATTERN</text:p>
          </table:table-cell>
          <table:table-cell office:value-type="string">
            <text:p>43.6532</text:p>
          </table:table-cell>
          <table:table-cell office:value-type="string">
            <text:p>-79.3832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Cloudflare, Inc.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67-71-233-187</text:p>
          </table:table-cell>
          <table:table-cell office:value-type="string">
            <text:p>167.71.233.18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2.9753</text:p>
          </table:table-cell>
          <table:table-cell office:value-type="string">
            <text:p>77.591</text:p>
          </table:table-cell>
          <table:table-cell office:value-type="string">
            <text:p>Bengaluru</text:p>
          </table:table-cell>
          <table:table-cell office:value-type="string">
            <text:p>India</text:p>
          </table:table-cell>
          <table:table-cell office:value-type="string">
            <text:p>DigitalOcean, LL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88-40-99-226</text:p>
          </table:table-cell>
          <table:table-cell office:value-type="string">
            <text:p>188.40.99.22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4777</text:p>
          </table:table-cell>
          <table:table-cell office:value-type="string">
            <text:p>12.3649</text:p>
          </table:table-cell>
          <table:table-cell office:value-type="string">
            <text:p>Falkenstein</text:p>
          </table:table-cell>
          <table:table-cell office:value-type="string">
            <text:p>Germany</text:p>
          </table:table-cell>
          <table:table-cell office:value-type="string">
            <text:p>Hetzner Online GmbH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92-168-47-1</text:p>
          </table:table-cell>
          <table:table-cell office:value-type="string">
            <text:p>192.168.47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gion</text:p>
          </table:table-cell>
          <table:table-cell office:value-type="string">
            <text:p>countryCode</text:p>
          </table:table-cell>
          <table:table-cell office:value-type="string">
            <text:p>org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94-233-73-173</text:p>
          </table:table-cell>
          <table:table-cell office:value-type="string">
            <text:p>194.233.73.17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Contabo Asia Private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96-251-107-104</text:p>
          </table:table-cell>
          <table:table-cell office:value-type="string">
            <text:p>196.251.107.10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1109</text:p>
          </table:table-cell>
          <table:table-cell office:value-type="string">
            <text:p>8.68213</text:p>
          </table:table-cell>
          <table:table-cell office:value-type="string">
            <text:p>Frankfurt am Main</text:p>
          </table:table-cell>
          <table:table-cell office:value-type="string">
            <text:p>Germany</text:p>
          </table:table-cell>
          <table:table-cell office:value-type="string">
            <text:p>Femo IT Solutions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98-23-185-136</text:p>
          </table:table-cell>
          <table:table-cell office:value-type="string">
            <text:p>198.23.185.13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0.5247</text:p>
          </table:table-cell>
          <table:table-cell office:value-type="string">
            <text:p>-111.8638</text:p>
          </table:table-cell>
          <table:table-cell office:value-type="string">
            <text:p>Draper</text:p>
          </table:table-cell>
          <table:table-cell office:value-type="string">
            <text:p>United States</text:p>
          </table:table-cell>
          <table:table-cell office:value-type="string">
            <text:p>Nohavps LL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209-18-47-61</text:p>
          </table:table-cell>
          <table:table-cell office:value-type="string">
            <text:p>209.18.47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09-18-47-62</text:p>
          </table:table-cell>
          <table:table-cell office:value-type="string">
            <text:p>209.18.47.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09-18-47-63</text:p>
          </table:table-cell>
          <table:table-cell office:value-type="string">
            <text:p>209.18.47.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21-132-29-137</text:p>
          </table:table-cell>
          <table:table-cell office:value-type="string">
            <text:p>221.132.29.13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1.0278</text:p>
          </table:table-cell>
          <table:table-cell office:value-type="string">
            <text:p>105.834</text:p>
          </table:table-cell>
          <table:table-cell office:value-type="string">
            <text:p>Hanoi</text:p>
          </table:table-cell>
          <table:table-cell office:value-type="string">
            <text:p>Vietnam</text:p>
          </table:table-cell>
          <table:table-cell office:value-type="string">
            <text:p>VNPT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35-186-241-51</text:p>
          </table:table-cell>
          <table:table-cell office:value-type="string">
            <text:p>35.186.241.5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35-190-25-25</text:p>
          </table:table-cell>
          <table:table-cell office:value-type="string">
            <text:p>35.190.25.2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43-138-165-203</text:p>
          </table:table-cell>
          <table:table-cell office:value-type="string">
            <text:p>43.138.165.20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181</text:p>
          </table:table-cell>
          <table:table-cell office:value-type="string">
            <text:p>113.2539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3-156-63-124</text:p>
          </table:table-cell>
          <table:table-cell office:value-type="string">
            <text:p>43.156.63.12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01-51-235</text:p>
          </table:table-cell>
          <table:table-cell office:value-type="string">
            <text:p>47.101.51.23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03-95-85</text:p>
          </table:table-cell>
          <table:table-cell office:value-type="string">
            <text:p>47.103.95.8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16-211-215</text:p>
          </table:table-cell>
          <table:table-cell office:value-type="string">
            <text:p>47.116.211.21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Hangzhou Alibaba Advertising Co., Ltd.</text:p>
          </table:table-cell>
          <table:table-cell office:value-type="string">
            <text:p>rekill_all_registered:Active</text:p>
          </table:table-cell>
        </table:table-row>
        <table:table-row>
          <table:table-cell office:value-type="string">
            <text:p>kill-47-236-149-142</text:p>
          </table:table-cell>
          <table:table-cell office:value-type="string">
            <text:p>47.236.149.14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rekill_all_registered:High</text:p>
          </table:table-cell>
        </table:table-row>
        <table:table-row>
          <table:table-cell office:value-type="string">
            <text:p>kill-47-238-154-144</text:p>
          </table:table-cell>
          <table:table-cell office:value-type="string">
            <text:p>47.238.154.1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22.3193</text:p>
          </table:table-cell>
          <table:table-cell office:value-type="string">
            <text:p>114.169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Alibaba Cloud LLC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47-82-234-12</text:p>
          </table:table-cell>
          <table:table-cell office:value-type="string">
            <text:p>47.82.234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49-233-215-164</text:p>
          </table:table-cell>
          <table:table-cell office:value-type="string">
            <text:p>49.233.215.16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5-101-86-44</text:p>
          </table:table-cell>
          <table:table-cell office:value-type="string">
            <text:p>5.101.86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45.5041</text:p>
          </table:table-cell>
          <table:table-cell office:value-type="string">
            <text:p>-73.552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GLOBALTELEHOST Corp.</text:p>
          </table:table-cell>
          <table:table-cell office:value-type="string">
            <text:p>rekill_all_registered:Censys</text:p>
          </table:table-cell>
        </table:table-row>
        <table:table-row>
          <table:table-cell office:value-type="string">
            <text:p>kill-68-118-158-1</text:p>
          </table:table-cell>
          <table:table-cell office:value-type="string">
            <text:p>68.118.158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BANDWIDTH_ABUSE</text:p>
          </table:table-cell>
          <table:table-cell office:value-type="string">
            <text:p>45.7452</text:p>
          </table:table-cell>
          <table:table-cell office:value-type="string">
            <text:p>-87.0646</text:p>
          </table:table-cell>
          <table:table-cell office:value-type="string">
            <text:p>Escanaba</text:p>
          </table:table-cell>
          <table:table-cell office:value-type="string">
            <text:p>United States</text:p>
          </table:table-cell>
          <table:table-cell office:value-type="string">
            <text:p>Charter Communications</text:p>
          </table:table-cell>
          <table:table-cell office:value-type="string">
            <text:p>rekill_same_host_validated</text:p>
          </table:table-cell>
        </table:table-row>
        <table:table-row>
          <table:table-cell office:value-type="string">
            <text:p>kill-71-10-216-1</text:p>
          </table:table-cell>
          <table:table-cell office:value-type="string">
            <text:p>71.10.216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6004</text:p>
          </table:table-cell>
          <table:table-cell office:value-type="string">
            <text:p>-104.891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Spectrum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82-157-52-180</text:p>
          </table:table-cell>
          <table:table-cell office:value-type="string">
            <text:p>82.157.52.180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ekill_all_registered:Active</text:p>
          </table:table-cell>
        </table:table-row>
        <table:table-row>
          <table:table-cell office:value-type="string">
            <text:p>kill-87-199-196-12</text:p>
          </table:table-cell>
          <table:table-cell office:value-type="string">
            <text:p>87.199.196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52.3716</text:p>
          </table:table-cell>
          <table:table-cell office:value-type="string">
            <text:p>4.8883</text:p>
          </table:table-cell>
          <table:table-cell office:value-type="string">
            <text:p>Amsterdam</text:p>
          </table:table-cell>
          <table:table-cell office:value-type="string">
            <text:p>The Netherlands</text:p>
          </table:table-cell>
          <table:table-cell office:value-type="string">
            <text:p>Servers Tech Fzco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threat-ai-optimized malware &amp; polymorphic engines</text:p>
          </table:table-cell>
          <table:table-cell office:value-type="string">
            <text:p>AI-optimized malware &amp; polymorphic engin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rent-child process policy + untrusted path scoring \u2014 not signature AV</text:p>
          </table:table-cell>
        </table:table-row>
        <table:table-row>
          <table:table-cell office:value-type="string">
            <text:p>threat-ai_autoscan_exploit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crush autoscan source</text:p>
          </table:table-cell>
        </table:table-row>
        <table:table-row>
          <table:table-cell office:value-type="string">
            <text:p>threat-ai_c2_beacon</text:p>
          </table:table-cell>
          <table:table-cell office:value-type="string">
            <text:p>Automated C2 &amp; machine-precision beaconing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sever machine-precision C2</text:p>
          </table:table-cell>
        </table:table-row>
        <table:table-row>
          <table:table-cell office:value-type="string">
            <text:p>threat-ai_dns_dhcp_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ver wire \u00b7 restore DNS/DHCP truth</text:p>
          </table:table-cell>
        </table:table-row>
        <table:table-row>
          <table:table-cell office:value-type="string">
            <text:p>threat-ai_exfil_shape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stop shaped exfil</text:p>
          </table:table-cell>
        </table:table-row>
        <table:table-row>
          <table:table-cell office:value-type="string">
            <text:p>threat-ai_malware_polymorph</text:p>
          </table:table-cell>
          <table:table-cell office:value-type="string">
            <text:p>AI-optimized malware &amp; polymorphic engin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eradicate temp-binary chain</text:p>
          </table:table-cell>
        </table:table-row>
        <table:table-row>
          <table:table-cell office:value-type="string">
            <text:p>threat-ai_ml_c2_stack</text:p>
          </table:table-cell>
          <table:table-cell office:value-type="string">
            <text:p>Stacked weak signals \u2014 ML-managed C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destroy stacked C2</text:p>
          </table:table-cell>
        </table:table-row>
        <table:table-row>
          <table:table-cell office:value-type="string">
            <text:p>threat-automated c2 &amp; machine-precision beaconing</text:p>
          </table:table-cell>
          <table:table-cell office:value-type="string">
            <text:p>Automated C2 &amp; machine-precision beaconing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acon pattern axis \u22657 + timing entropy collapse on flow key</text:p>
          </table:table-cell>
        </table:table-row>
        <table:table-row>
          <table:table-cell office:value-type="string">
            <text:p>threat-autonomous vulnerability scan &amp; exploit chains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neypot paths + exploit-port DPI + listener surge correlation</text:p>
          </table:table-cell>
        </table:table-row>
        <table:table-row>
          <table:table-cell office:value-type="string">
            <text:p>threat-dns, dhcp &amp; network infrastructure 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teway integrity + DNS query entropy + resolv.conf truth cycle</text:p>
          </table:table-cell>
        </table:table-row>
        <table:table-row>
          <table:table-cell office:value-type="string">
            <text:p>threat-dogshit-ammonet-field-py-panel</text:p>
          </table:table-cell>
          <table:table-cell office:value-type="string">
            <text:p>ammonet fiel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awaitshell</text:p>
          </table:table-cell>
          <table:table-cell office:value-type="string">
            <text:p>awaitshe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lock_until_ms</text:p>
          </table:table-cell>
          <table:table-cell office:value-type="string">
            <text:p>block_until_m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oot-simulate-sh</text:p>
          </table:table-cell>
          <table:table-cell office:value-type="string">
            <text:p>boot simulate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rowser-awareness-py-json</text:p>
          </table:table-cell>
          <table:table-cell office:value-type="string">
            <text:p>browser awarenes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connection-gatekeeper-py</text:p>
          </table:table-cell>
          <table:table-cell office:value-type="string">
            <text:p>connection gatekeeper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dig-@127-0-0-1</text:p>
          </table:table-cell>
          <table:table-cell office:value-type="string">
            <text:p>dig @127 0 0 1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otnet-dns-dhcp-py-json</text:p>
          </table:table-cell>
          <table:table-cell office:value-type="string">
            <text:p>field botnet dns dhc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otnet-registry-py-json</text:p>
          </table:table-cell>
          <table:table-cell office:value-type="string">
            <text:p>field botnet registr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rain-panel-py-json</text:p>
          </table:table-cell>
          <table:table-cell office:value-type="string">
            <text:p>field brain panel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clipboard-wire-py-json</text:p>
          </table:table-cell>
          <table:table-cell office:value-type="string">
            <text:p>field clipboard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command-py-json</text:p>
          </table:table-cell>
          <table:table-cell office:value-type="string">
            <text:p>field comman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device-map-py-json</text:p>
          </table:table-cell>
          <table:table-cell office:value-type="string">
            <text:p>field device ma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endpoint-registry-py-json</text:p>
          </table:table-cell>
          <table:table-cell office:value-type="string">
            <text:p>field endpoint registr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everyone-counter-py-json</text:p>
          </table:table-cell>
          <table:table-cell office:value-type="string">
            <text:p>field everyone count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github-legacy-py-json</text:p>
          </table:table-cell>
          <table:table-cell office:value-type="string">
            <text:p>field github legac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github-traffic-shard-py-json</text:p>
          </table:table-cell>
          <table:table-cell office:value-type="string">
            <text:p>field github traffic shar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internet-unified-py-panel</text:p>
          </table:table-cell>
          <table:table-cell office:value-type="string">
            <text:p>field internet unifie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ipv4-device-sovereign-py-json</text:p>
          </table:table-cell>
          <table:table-cell office:value-type="string">
            <text:p>field ipv4 device sovereign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monster-monitor-py-json</text:p>
          </table:table-cell>
          <table:table-cell office:value-type="string">
            <text:p>field monster monit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never-down-py-ensure</text:p>
          </table:table-cell>
          <table:table-cell office:value-type="string">
            <text:p>field never down py ensur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acket-deinterlace-py-json</text:p>
          </table:table-cell>
          <table:table-cell office:value-type="string">
            <text:p>field packet deinterlac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lanetary-speed-py-json</text:p>
          </table:table-cell>
          <table:table-cell office:value-type="string">
            <text:p>field planetary spee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ort-ddos-shield-py-json</text:p>
          </table:table-cell>
          <table:table-cell office:value-type="string">
            <text:p>field port ddos shiel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queen-browser-py-json</text:p>
          </table:table-cell>
          <table:table-cell office:value-type="string">
            <text:p>field queen brows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overeign-protocol-bridge-py-json</text:p>
          </table:table-cell>
          <table:table-cell office:value-type="string">
            <text:p>field sovereign protocol bridg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overeign-stack-meld-py-panel</text:p>
          </table:table-cell>
          <table:table-cell office:value-type="string">
            <text:p>field sovereign stack mel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tack-layer-py-json</text:p>
          </table:table-cell>
          <table:table-cell office:value-type="string">
            <text:p>field stack lay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thermal-guard-py-json</text:p>
          </table:table-cell>
          <table:table-cell office:value-type="string">
            <text:p>field thermal guar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nderlay-hotkey-py</text:p>
          </table:table-cell>
          <table:table-cell office:value-type="string">
            <text:p>field underlay hotkey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nified-bus-py-json</text:p>
          </table:table-cell>
          <table:table-cell office:value-type="string">
            <text:p>field unified b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s-intel-py-json</text:p>
          </table:table-cell>
          <table:table-cell office:value-type="string">
            <text:p>field us intel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voltage-regulation-py-json</text:p>
          </table:table-cell>
          <table:table-cell office:value-type="string">
            <text:p>field voltage regulation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it-publish-sh</text:p>
          </table:table-cell>
          <table:table-cell office:value-type="string">
            <text:p>git publish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ithub-pages-queue-sh</text:p>
          </table:table-cell>
          <table:table-cell office:value-type="string">
            <text:p>github pages queue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rok-firmware-audit-sh</text:p>
          </table:table-cell>
          <table:table-cell office:value-type="string">
            <text:p>grok firmware audit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ardware-wire-py-json</text:p>
          </table:table-cell>
          <table:table-cell office:value-type="string">
            <text:p>hardware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-attack-map-py-json</text:p>
          </table:table-cell>
          <table:table-cell office:value-type="string">
            <text:p>host attack ma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-attack-map-py-json-panel</text:p>
          </table:table-cell>
          <table:table-cell office:value-type="string">
            <text:p>host attack map py json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-g16-online-py-panel</text:p>
          </table:table-cell>
          <table:table-cell office:value-type="string">
            <text:p>hostess7 g16 online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-lab-sovereign-py-panel</text:p>
          </table:table-cell>
          <table:table-cell office:value-type="string">
            <text:p>hostess7 lab sovereign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_pages_surfaces_build-py</text:p>
          </table:table-cell>
          <table:table-cell office:value-type="string">
            <text:p>hostess7_pages_surfaces_build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monitor-jockey-py</text:p>
          </table:table-cell>
          <table:table-cell office:value-type="string">
            <text:p>monitor jockey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nexus-logic-gate-py-json</text:p>
          </table:table-cell>
          <table:table-cell office:value-type="string">
            <text:p>nexus logic gat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notify_on_output</text:p>
          </table:table-cell>
          <table:table-cell office:value-type="string">
            <text:p>notify_on_outpu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obs-threat-posterity-bridge-py-json</text:p>
          </table:table-cell>
          <table:table-cell office:value-type="string">
            <text:p>obs threat posterity bridg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acket-field-py-json</text:p>
          </table:table-cell>
          <table:table-cell office:value-type="string">
            <text:p>packet fiel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lanetary-observer-py-json</text:p>
          </table:table-cell>
          <table:table-cell office:value-type="string">
            <text:p>planetary observ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ammoos-hub-pages-sh</text:p>
          </table:table-cell>
          <table:table-cell office:value-type="string">
            <text:p>publish ammoos hub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ammoos-pages-sh</text:p>
          </table:table-cell>
          <table:table-cell office:value-type="string">
            <text:p>publish ammoos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field-pages-sh</text:p>
          </table:table-cell>
          <table:table-cell office:value-type="string">
            <text:p>publish field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hostess7-github-sh</text:p>
          </table:table-cell>
          <table:table-cell office:value-type="string">
            <text:p>publish hostess7 github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hostess7-pages-sh</text:p>
          </table:table-cell>
          <table:table-cell office:value-type="string">
            <text:p>publish hostess7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pages-sh</text:p>
          </table:table-cell>
          <table:table-cell office:value-type="string">
            <text:p>publish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profile-pages-sh</text:p>
          </table:table-cell>
          <table:table-cell office:value-type="string">
            <text:p>publish profile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stack-pages-sh</text:p>
          </table:table-cell>
          <table:table-cell office:value-type="string">
            <text:p>publish stack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qemu-world-status-py-json</text:p>
          </table:table-cell>
          <table:table-cell office:value-type="string">
            <text:p>qemu world stat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queen_field_nexus-py-json</text:p>
          </table:table-cell>
          <table:table-cell office:value-type="string">
            <text:p>queen_field_nex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leep-infinity</text:p>
          </table:table-cell>
          <table:table-cell office:value-type="string">
            <text:p>sleep infinit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mart-wire-py-json</text:p>
          </table:table-cell>
          <table:table-cell office:value-type="string">
            <text:p>smart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ubagent_type</text:p>
          </table:table-cell>
          <table:table-cell office:value-type="string">
            <text:p>subagent_typ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ystemd-inhibit</text:p>
          </table:table-cell>
          <table:table-cell office:value-type="string">
            <text:p>systemd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thermal-governor-py-json</text:p>
          </table:table-cell>
          <table:table-cell office:value-type="string">
            <text:p>thermal govern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universal-protector-py-json</text:p>
          </table:table-cell>
          <table:table-cell office:value-type="string">
            <text:p>universal protect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znetwork-orchestrator-py-status</text:p>
          </table:table-cell>
          <table:table-cell office:value-type="string">
            <text:p>znetwork orchestrator py statu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field-hostile-registry</text:p>
          </table:table-cell>
          <table:table-cell office:value-type="string">
            <text:p>field hostile regist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grok-spawn-killer-total</text:p>
          </table:table-cell>
          <table:table-cell office:value-type="string">
            <text:p>grok spawn killer tota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internet-clean-all-names</text:p>
          </table:table-cell>
          <table:table-cell office:value-type="string">
            <text:p>internet clean all nam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internet-clean-all-sweep</text:p>
          </table:table-cell>
          <table:table-cell office:value-type="string">
            <text:p>internet clean all swe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boot-simulate-leak</text:p>
          </table:table-cell>
          <table:table-cell office:value-type="string">
            <text:p>boot simulate leak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dump-bash-state</text:p>
          </table:table-cell>
          <table:table-cell office:value-type="string">
            <text:p>dump bash stat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firmware-audit-orphan</text:p>
          </table:table-cell>
          <table:table-cell office:value-type="string">
            <text:p>firmware audit orpha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export</text:p>
          </table:table-cell>
          <table:table-cell office:value-type="string">
            <text:p>grok agent expor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inhibit</text:p>
          </table:table-cell>
          <table:table-cell office:value-type="string">
            <text:p>grok agent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serve</text:p>
          </table:table-cell>
          <table:table-cell office:value-type="string">
            <text:p>grok agent serv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stdio</text:p>
          </table:table-cell>
          <table:table-cell office:value-type="string">
            <text:p>grok agent stdio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bash-state-markers</text:p>
          </table:table-cell>
          <table:table-cell office:value-type="string">
            <text:p>grok bash state marker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boot-simulate</text:p>
          </table:table-cell>
          <table:table-cell office:value-type="string">
            <text:p>grok boot simulat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firmware-audit</text:p>
          </table:table-cell>
          <table:table-cell office:value-type="string">
            <text:p>grok firmware aud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awaitshell</text:p>
          </table:table-cell>
          <table:table-cell office:value-type="string">
            <text:p>grok interference awaitshe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block-until</text:p>
          </table:table-cell>
          <table:table-cell office:value-type="string">
            <text:p>grok interference block unti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dump-wait</text:p>
          </table:table-cell>
          <table:table-cell office:value-type="string">
            <text:p>grok interference dump wa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harness-wait</text:p>
          </table:table-cell>
          <table:table-cell office:value-type="string">
            <text:p>grok interference harness wa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inhibit</text:p>
          </table:table-cell>
          <table:table-cell office:value-type="string">
            <text:p>grok interference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notify-on-output</text:p>
          </table:table-cell>
          <table:table-cell office:value-type="string">
            <text:p>grok interference notify on outpu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sleep</text:p>
          </table:table-cell>
          <table:table-cell office:value-type="string">
            <text:p>grok interference sle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never-sleeps-inhibit</text:p>
          </table:table-cell>
          <table:table-cell office:value-type="string">
            <text:p>grok never sleeps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project-harness</text:p>
          </table:table-cell>
          <table:table-cell office:value-type="string">
            <text:p>grok project harnes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ession-orphan</text:p>
          </table:table-cell>
          <table:table-cell office:value-type="string">
            <text:p>grok session orpha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hadow-find</text:p>
          </table:table-cell>
          <table:table-cell office:value-type="string">
            <text:p>grok shadow find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hadow-grep</text:p>
          </table:table-cell>
          <table:table-cell office:value-type="string">
            <text:p>grok shadow gr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ubagent</text:p>
          </table:table-cell>
          <table:table-cell office:value-type="string">
            <text:p>grok subagen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task-spawn</text:p>
          </table:table-cell>
          <table:table-cell office:value-type="string">
            <text:p>grok task spaw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who-sleep-infinity</text:p>
          </table:table-cell>
          <table:table-cell office:value-type="string">
            <text:p>grok who sleep infinit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hijack-serve</text:p>
          </table:table-cell>
          <table:table-cell office:value-type="string">
            <text:p>hijack serv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ammonet-storm</text:p>
          </table:table-cell>
          <table:table-cell office:value-type="string">
            <text:p>unsafe panel ammonet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g16-storm</text:p>
          </table:table-cell>
          <table:table-cell office:value-type="string">
            <text:p>unsafe panel g16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gatekeeper-storm</text:p>
          </table:table-cell>
          <table:table-cell office:value-type="string">
            <text:p>unsafe panel gatekeeper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internet-storm</text:p>
          </table:table-cell>
          <table:table-cell office:value-type="string">
            <text:p>unsafe panel internet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lab-storm</text:p>
          </table:table-cell>
          <table:table-cell office:value-type="string">
            <text:p>unsafe panel lab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protocol-storm</text:p>
          </table:table-cell>
          <table:table-cell office:value-type="string">
            <text:p>unsafe panel protocol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qemu-storm</text:p>
          </table:table-cell>
          <table:table-cell office:value-type="string">
            <text:p>unsafe panel qemu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machine-speed exfiltration &amp; baseline mimicry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-host egress baseline + gatekeeper bandwidth/stream axes</text:p>
          </table:table-cell>
        </table:table-row>
        <table:table-row>
          <table:table-cell office:value-type="string">
            <text:p>threat-microsoft-botnet-kill</text:p>
          </table:table-cell>
          <table:table-cell office:value-type="string">
            <text:p>microsoft botnet ki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stacked weak signals \u2014 ml-managed c2</text:p>
          </table:table-cell>
          <table:table-cell office:value-type="string">
            <text:p>Stacked weak signals \u2014 ML-managed C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relation score + multi-vector same peer \u2014 meta but actionable</text:p>
          </table:table-cell>
        </table:table-row>
        <table:table-row>
          <table:table-cell office:value-type="string">
            <text:p>threat-world-dns-dhcp-209-18-47-61</text:p>
          </table:table-cell>
          <table:table-cell office:value-type="string">
            <text:p>world dns dhcp 209 18 47 61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209-18-47-62</text:p>
          </table:table-cell>
          <table:table-cell office:value-type="string">
            <text:p>world dns dhcp 209 18 47 6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209-18-47-63</text:p>
          </table:table-cell>
          <table:table-cell office:value-type="string">
            <text:p>world dns dhcp 209 18 47 63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collision-guard</text:p>
          </table:table-cell>
          <table:table-cell office:value-type="string">
            <text:p>world dns dhcp collision guard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agent serve --hijack</text:p>
          </table:table-cell>
          <table:table-cell office:value-type="string">
            <text:p>agent serve --hijack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ai-scale phishing, vishing, synthetic identity</text:p>
          </table:table-cell>
          <table:table-cell office:value-type="string">
            <text:p>AI-scale phishing, vishing, synthetic identit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norability + browser awareness + auth velocity \u2014 not content ML alone</text:p>
          </table:table-cell>
        </table:table-row>
        <table:table-row>
          <table:table-cell office:value-type="string">
            <text:p>threat-ai_phish_fraud</text:p>
          </table:table-cell>
          <table:table-cell office:value-type="string">
            <text:p>AI-scale phishing, vishing, synthetic identit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ver wire \u00b7 block fraud egress</text:p>
          </table:table-cell>
        </table:table-row>
        <table:table-row>
          <table:table-cell office:value-type="string">
            <text:p>threat-ammonet-field.py panel</text:p>
          </table:table-cell>
          <table:table-cell office:value-type="string">
            <text:p>ammonet-field.py panel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awaitshell</text:p>
          </table:table-cell>
          <table:table-cell office:value-type="string">
            <text:p>AwaitShell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lock_until_ms</text:p>
          </table:table-cell>
          <table:table-cell office:value-type="string">
            <text:p>block_until_ms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oot-simulate.sh</text:p>
          </table:table-cell>
          <table:table-cell office:value-type="string">
            <text:p>boot-simulate.sh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rowser-awareness.py json</text:p>
          </table:table-cell>
          <table:table-cell office:value-type="string">
            <text:p>browser-awareness.py json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collision guard \u2014 7 foreign hooks, 0 eradicated on sight</text:p>
          </table:table-cell>
          <table:table-cell office:value-type="string">
            <text:p>Collision guard \u2014 7 foreign hooks, 0 eradicated on sight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P CPE resolvers, foreign DHCP OFFERs, and rogue listeners that try to hijack planetary DNS/DHCP authority get permanent blocks, nft drops, and SIGKILL. No qua</text:p>
          </table:table-cell>
        </table:table-row>
        <table:table-row>
          <table:table-cell office:value-type="string">
            <text:p>threat-connection-gatekeeper.py</text:p>
          </table:table-cell>
          <table:table-cell office:value-type="string">
            <text:p>connection-gatekeeper.p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ig @127.0.0.1</text:p>
          </table:table-cell>
          <table:table-cell office:value-type="string">
            <text:p>dig @127.0.0.1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uplicate grok agent serve spawner</text:p>
          </table:table-cell>
          <table:table-cell office:value-type="string">
            <text:p>Duplicate grok agent serve spawner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mp_bash_state piles, GROK_AGENT shells, sleep infinity, subagent storms, and panel subprocess duplicates get SIGKILL. GrokSpawnKiller never sleeps \u2014 every kil</text:p>
          </table:table-cell>
        </table:table-row>
        <table:table-row>
          <table:table-cell office:value-type="string">
            <text:p>threat-duplicate grok agent stdio spawner</text:p>
          </table:table-cell>
          <table:table-cell office:value-type="string">
            <text:p>Duplicate grok agent stdio spawner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mp_bash_state piles, GROK_AGENT shells, sleep infinity, subagent storms, and panel subprocess duplicates get SIGKILL. GrokSpawnKiller never sleeps \u2014 every kil</text:p>
          </table:table-cell>
        </table:table-row>
      </table:table>
      <table:table table:name="Copilot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vector</text:p>
          </table:table-cell>
          <table:table-cell office:value-type="string">
            <text:p>rekill_count</text:p>
          </table:table-cell>
          <table:table-cell office:value-type="string">
            <text:p>last_rekill_a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lobal-copilot</text:p>
          </table:table-cell>
          <table:table-cell office:value-type="string">
            <text:p>Copilot · GLOBAL STAGE</text:p>
          </table:table-cell>
          <table:table-cell office:value-type="string">
            <text:p>COPILOT_GLOBAL</text:p>
          </table:table-cell>
          <table:table-cell office:value-type="string">
            <text:p>462</text:p>
          </table:table-cell>
          <table:table-cell office:value-type="string">
            <text:p>2026-07-13T21:53Z</text:p>
          </table:table-cell>
          <table:table-cell office:value-type="string">
            <text:p>LETHAL_DESTROYED</text:p>
          </table:table-cell>
        </table:table-row>
      </table:table>
      <table:table table:name="Infra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angel_status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angel_commander</text:p>
          </table:table-cell>
          <table:table-cell office:value-type="string">
            <text:p>Forever Watchguard Angel</text:p>
          </table:table-cell>
        </table:table-row>
        <table:table-row>
          <table:table-cell office:value-type="string">
            <text:p>dns_status</text:p>
          </table:table-cell>
          <table:table-cell office:value-type="string">
            <text:p>UP</text:p>
          </table:table-cell>
        </table:table-row>
        <table:table-row>
          <table:table-cell office:value-type="string">
            <text:p>dns_policy</text:p>
          </table:table-cell>
          <table:table-cell office:value-type="string">
            <text:p>foreign_world_dns_hooks BLOCKED · local truth · field sole authority</text:p>
          </table:table-cell>
        </table:table-row>
        <table:table-row>
          <table:table-cell office:value-type="string">
            <text:p>monitor_overall</text:p>
          </table:table-cell>
          <table:table-cell office:value-type="string">
            <text:p>CLEAR</text:p>
          </table:table-cell>
        </table:table-row>
      </table:table>
    </office:spreadsheet>
  </office:body>
</office:document-content>
</file>