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tatus">
        <table:table-row>
          <table:table-cell office:value-type="string">
            <text:p>field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ts</text:p>
          </table:table-cell>
          <table:table-cell office:value-type="string">
            <text:p>2026-07-13T21:34Z</text:p>
          </table:table-cell>
        </table:table-row>
        <table:table-row>
          <table:table-cell office:value-type="string">
            <text:p>stack</text:p>
          </table:table-cell>
          <table:table-cell office:value-type="string">
            <text:p>C++</text:p>
          </table:table-cell>
        </table:table-row>
        <table:table-row>
          <table:table-cell office:value-type="string">
            <text:p>scripts</text:p>
          </table:table-cell>
          <table:table-cell office:value-type="string">
            <text:p>FORBIDDEN</text:p>
          </table:table-cell>
        </table:table-row>
        <table:table-row>
          <table:table-cell office:value-type="string">
            <text:p>stage</text:p>
          </table:table-cell>
          <table:table-cell office:value-type="string">
            <text:p>GLOBAL</text:p>
          </table:table-cell>
        </table:table-row>
        <table:table-row>
          <table:table-cell office:value-type="string">
            <text:p>blessing</text:p>
          </table:table-cell>
          <table:table-cell office:value-type="string">
            <text:p>God Bless</text:p>
          </table:table-cell>
        </table:table-row>
        <table:table-row>
          <table:table-cell office:value-type="string">
            <text:p>motto</text:p>
          </table:table-cell>
          <table:table-cell office:value-type="string">
            <text:p>LETHAL KILL/REKILL. Cook Field FAT. Queue reburn. Burn. Scrub. Destroy to wall outlet. Terror does not exist. God Bless.</text:p>
          </table:table-cell>
        </table:table-row>
        <table:table-row>
          <table:table-cell office:value-type="string">
            <text:p>planet_defending</text:p>
          </table:table-cell>
          <table:table-cell office:value-type="string">
            <text:p>2154000</text:p>
          </table:table-cell>
        </table:table-row>
        <table:table-row>
          <table:table-cell office:value-type="string">
            <text:p>planet_areas</text:p>
          </table:table-cell>
          <table:table-cell office:value-type="string">
            <text:p>359</text:p>
          </table:table-cell>
        </table:table-row>
        <table:table-row>
          <table:table-cell office:value-type="string">
            <text:p>copilot_lifetime_rekills</text:p>
          </table:table-cell>
          <table:table-cell office:value-type="string">
            <text:p>1432</text:p>
          </table:table-cell>
        </table:table-row>
        <table:table-row>
          <table:table-cell office:value-type="string">
            <text:p>angel</text:p>
          </table:table-cell>
          <table:table-cell office:value-type="string">
            <text:p>SEALED_UP</text:p>
          </table:table-cell>
        </table:table-row>
        <table:table-row>
          <table:table-cell office:value-type="string">
            <text:p>dns</text:p>
          </table:table-cell>
          <table:table-cell office:value-type="string">
            <text:p>UP</text:p>
          </table:table-cell>
        </table:table-row>
      </table:table>
      <table:table table:name="Fleet">
        <table:table-row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zone</text:p>
          </table:table-cell>
          <table:table-cell office:value-type="string">
            <text:p>racks</text:p>
          </table:table-cell>
          <table:table-cell office:value-type="string">
            <text:p>online</text:p>
          </table:table-cell>
          <table:table-cell office:value-type="string">
            <text:p>status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</table:table-row>
        <table:table-row>
          <table:table-cell office:value-type="string">
            <text:p>AF</text:p>
          </table:table-cell>
          <table:table-cell office:value-type="string">
            <text:p>Afghan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L</text:p>
          </table:table-cell>
          <table:table-cell office:value-type="string">
            <text:p>Alba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Z</text:p>
          </table:table-cell>
          <table:table-cell office:value-type="string">
            <text:p>Alger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D</text:p>
          </table:table-cell>
          <table:table-cell office:value-type="string">
            <text:p>Andorr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O</text:p>
          </table:table-cell>
          <table:table-cell office:value-type="string">
            <text:p>Angol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R</text:p>
          </table:table-cell>
          <table:table-cell office:value-type="string">
            <text:p>Argentin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M</text:p>
          </table:table-cell>
          <table:table-cell office:value-type="string">
            <text:p>Armen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U</text:p>
          </table:table-cell>
          <table:table-cell office:value-type="string">
            <text:p>Australi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T</text:p>
          </table:table-cell>
          <table:table-cell office:value-type="string">
            <text:p>Austr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Z</text:p>
          </table:table-cell>
          <table:table-cell office:value-type="string">
            <text:p>Azerbaij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S</text:p>
          </table:table-cell>
          <table:table-cell office:value-type="string">
            <text:p>Bahama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H</text:p>
          </table:table-cell>
          <table:table-cell office:value-type="string">
            <text:p>Bahrai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D</text:p>
          </table:table-cell>
          <table:table-cell office:value-type="string">
            <text:p>Bangladesh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B</text:p>
          </table:table-cell>
          <table:table-cell office:value-type="string">
            <text:p>Barbado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Y</text:p>
          </table:table-cell>
          <table:table-cell office:value-type="string">
            <text:p>Belarus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E</text:p>
          </table:table-cell>
          <table:table-cell office:value-type="string">
            <text:p>Belgium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Z</text:p>
          </table:table-cell>
          <table:table-cell office:value-type="string">
            <text:p>Belize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J</text:p>
          </table:table-cell>
          <table:table-cell office:value-type="string">
            <text:p>Beni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T</text:p>
          </table:table-cell>
          <table:table-cell office:value-type="string">
            <text:p>Bhu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O</text:p>
          </table:table-cell>
          <table:table-cell office:value-type="string">
            <text:p>Bolivi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W</text:p>
          </table:table-cell>
          <table:table-cell office:value-type="string">
            <text:p>Botswan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R</text:p>
          </table:table-cell>
          <table:table-cell office:value-type="string">
            <text:p>Brazil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N</text:p>
          </table:table-cell>
          <table:table-cell office:value-type="string">
            <text:p>Brune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G</text:p>
          </table:table-cell>
          <table:table-cell office:value-type="string">
            <text:p>Bulgar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F</text:p>
          </table:table-cell>
          <table:table-cell office:value-type="string">
            <text:p>Burkina Fas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I</text:p>
          </table:table-cell>
          <table:table-cell office:value-type="string">
            <text:p>Burund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V</text:p>
          </table:table-cell>
          <table:table-cell office:value-type="string">
            <text:p>Cabo Verd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H</text:p>
          </table:table-cell>
          <table:table-cell office:value-type="string">
            <text:p>Cambod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M</text:p>
          </table:table-cell>
          <table:table-cell office:value-type="string">
            <text:p>Cameroo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A</text:p>
          </table:table-cell>
          <table:table-cell office:value-type="string">
            <text:p>Canad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D</text:p>
          </table:table-cell>
          <table:table-cell office:value-type="string">
            <text:p>Chad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L</text:p>
          </table:table-cell>
          <table:table-cell office:value-type="string">
            <text:p>Chile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N</text:p>
          </table:table-cell>
          <table:table-cell office:value-type="string">
            <text:p>Chin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O</text:p>
          </table:table-cell>
          <table:table-cell office:value-type="string">
            <text:p>Colombi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M</text:p>
          </table:table-cell>
          <table:table-cell office:value-type="string">
            <text:p>Comoro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G</text:p>
          </table:table-cell>
          <table:table-cell office:value-type="string">
            <text:p>Cong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D</text:p>
          </table:table-cell>
          <table:table-cell office:value-type="string">
            <text:p>DR Cong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R</text:p>
          </table:table-cell>
          <table:table-cell office:value-type="string">
            <text:p>Costa Rica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I</text:p>
          </table:table-cell>
          <table:table-cell office:value-type="string">
            <text:p>C\u00f4te d'Ivoir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R</text:p>
          </table:table-cell>
          <table:table-cell office:value-type="string">
            <text:p>Croat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U</text:p>
          </table:table-cell>
          <table:table-cell office:value-type="string">
            <text:p>Cub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Y</text:p>
          </table:table-cell>
          <table:table-cell office:value-type="string">
            <text:p>Cyprus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Z</text:p>
          </table:table-cell>
          <table:table-cell office:value-type="string">
            <text:p>Czech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K</text:p>
          </table:table-cell>
          <table:table-cell office:value-type="string">
            <text:p>Denmark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J</text:p>
          </table:table-cell>
          <table:table-cell office:value-type="string">
            <text:p>Djibout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M</text:p>
          </table:table-cell>
          <table:table-cell office:value-type="string">
            <text:p>Dominic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C</text:p>
          </table:table-cell>
          <table:table-cell office:value-type="string">
            <text:p>Ecuador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G</text:p>
          </table:table-cell>
          <table:table-cell office:value-type="string">
            <text:p>Egypt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V</text:p>
          </table:table-cell>
          <table:table-cell office:value-type="string">
            <text:p>El Salvador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R</text:p>
          </table:table-cell>
          <table:table-cell office:value-type="string">
            <text:p>Eritre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E</text:p>
          </table:table-cell>
          <table:table-cell office:value-type="string">
            <text:p>Esto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Z</text:p>
          </table:table-cell>
          <table:table-cell office:value-type="string">
            <text:p>Eswatin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T</text:p>
          </table:table-cell>
          <table:table-cell office:value-type="string">
            <text:p>Ethiop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J</text:p>
          </table:table-cell>
          <table:table-cell office:value-type="string">
            <text:p>Fiji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I</text:p>
          </table:table-cell>
          <table:table-cell office:value-type="string">
            <text:p>Fin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R</text:p>
          </table:table-cell>
          <table:table-cell office:value-type="string">
            <text:p>France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A</text:p>
          </table:table-cell>
          <table:table-cell office:value-type="string">
            <text:p>Gabo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M</text:p>
          </table:table-cell>
          <table:table-cell office:value-type="string">
            <text:p>Gamb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E</text:p>
          </table:table-cell>
          <table:table-cell office:value-type="string">
            <text:p>Georg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E</text:p>
          </table:table-cell>
          <table:table-cell office:value-type="string">
            <text:p>German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H</text:p>
          </table:table-cell>
          <table:table-cell office:value-type="string">
            <text:p>Ghan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R</text:p>
          </table:table-cell>
          <table:table-cell office:value-type="string">
            <text:p>Greece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D</text:p>
          </table:table-cell>
          <table:table-cell office:value-type="string">
            <text:p>Grenad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T</text:p>
          </table:table-cell>
          <table:table-cell office:value-type="string">
            <text:p>Guatemala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N</text:p>
          </table:table-cell>
          <table:table-cell office:value-type="string">
            <text:p>Guine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W</text:p>
          </table:table-cell>
          <table:table-cell office:value-type="string">
            <text:p>Guinea-Bissau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Y</text:p>
          </table:table-cell>
          <table:table-cell office:value-type="string">
            <text:p>Guyan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T</text:p>
          </table:table-cell>
          <table:table-cell office:value-type="string">
            <text:p>Haiti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N</text:p>
          </table:table-cell>
          <table:table-cell office:value-type="string">
            <text:p>Honduras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U</text:p>
          </table:table-cell>
          <table:table-cell office:value-type="string">
            <text:p>Hungar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S</text:p>
          </table:table-cell>
          <table:table-cell office:value-type="string">
            <text:p>Ice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N</text:p>
          </table:table-cell>
          <table:table-cell office:value-type="string">
            <text:p>Ind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dones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R</text:p>
          </table:table-cell>
          <table:table-cell office:value-type="string">
            <text:p>Ir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Q</text:p>
          </table:table-cell>
          <table:table-cell office:value-type="string">
            <text:p>Iraq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E</text:p>
          </table:table-cell>
          <table:table-cell office:value-type="string">
            <text:p>Ire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L</text:p>
          </table:table-cell>
          <table:table-cell office:value-type="string">
            <text:p>Israel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T</text:p>
          </table:table-cell>
          <table:table-cell office:value-type="string">
            <text:p>Ital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M</text:p>
          </table:table-cell>
          <table:table-cell office:value-type="string">
            <text:p>Jamaic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P</text:p>
          </table:table-cell>
          <table:table-cell office:value-type="string">
            <text:p>Jap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O</text:p>
          </table:table-cell>
          <table:table-cell office:value-type="string">
            <text:p>Jord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Z</text:p>
          </table:table-cell>
          <table:table-cell office:value-type="string">
            <text:p>Kazakh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E</text:p>
          </table:table-cell>
          <table:table-cell office:value-type="string">
            <text:p>Keny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I</text:p>
          </table:table-cell>
          <table:table-cell office:value-type="string">
            <text:p>Kiribati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P</text:p>
          </table:table-cell>
          <table:table-cell office:value-type="string">
            <text:p>North Kore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R</text:p>
          </table:table-cell>
          <table:table-cell office:value-type="string">
            <text:p>South Kore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W</text:p>
          </table:table-cell>
          <table:table-cell office:value-type="string">
            <text:p>Kuwait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G</text:p>
          </table:table-cell>
          <table:table-cell office:value-type="string">
            <text:p>Kyrgyz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A</text:p>
          </table:table-cell>
          <table:table-cell office:value-type="string">
            <text:p>Lao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V</text:p>
          </table:table-cell>
          <table:table-cell office:value-type="string">
            <text:p>Latv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B</text:p>
          </table:table-cell>
          <table:table-cell office:value-type="string">
            <text:p>Lebano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S</text:p>
          </table:table-cell>
          <table:table-cell office:value-type="string">
            <text:p>Lesoth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R</text:p>
          </table:table-cell>
          <table:table-cell office:value-type="string">
            <text:p>Liber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Y</text:p>
          </table:table-cell>
          <table:table-cell office:value-type="string">
            <text:p>Liby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I</text:p>
          </table:table-cell>
          <table:table-cell office:value-type="string">
            <text:p>Liechtenstei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T</text:p>
          </table:table-cell>
          <table:table-cell office:value-type="string">
            <text:p>Lithua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U</text:p>
          </table:table-cell>
          <table:table-cell office:value-type="string">
            <text:p>Luxembourg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G</text:p>
          </table:table-cell>
          <table:table-cell office:value-type="string">
            <text:p>Madagascar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W</text:p>
          </table:table-cell>
          <table:table-cell office:value-type="string">
            <text:p>Malaw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Y</text:p>
          </table:table-cell>
          <table:table-cell office:value-type="string">
            <text:p>Malays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V</text:p>
          </table:table-cell>
          <table:table-cell office:value-type="string">
            <text:p>Maldive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L</text:p>
          </table:table-cell>
          <table:table-cell office:value-type="string">
            <text:p>Mal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T</text:p>
          </table:table-cell>
          <table:table-cell office:value-type="string">
            <text:p>Malt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R</text:p>
          </table:table-cell>
          <table:table-cell office:value-type="string">
            <text:p>Mauritan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U</text:p>
          </table:table-cell>
          <table:table-cell office:value-type="string">
            <text:p>Mauritiu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X</text:p>
          </table:table-cell>
          <table:table-cell office:value-type="string">
            <text:p>Mexico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M</text:p>
          </table:table-cell>
          <table:table-cell office:value-type="string">
            <text:p>Micronesi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D</text:p>
          </table:table-cell>
          <table:table-cell office:value-type="string">
            <text:p>Moldov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C</text:p>
          </table:table-cell>
          <table:table-cell office:value-type="string">
            <text:p>Monac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N</text:p>
          </table:table-cell>
          <table:table-cell office:value-type="string">
            <text:p>Mongol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E</text:p>
          </table:table-cell>
          <table:table-cell office:value-type="string">
            <text:p>Montenegr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A</text:p>
          </table:table-cell>
          <table:table-cell office:value-type="string">
            <text:p>Morocc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Z</text:p>
          </table:table-cell>
          <table:table-cell office:value-type="string">
            <text:p>Mozambiqu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M</text:p>
          </table:table-cell>
          <table:table-cell office:value-type="string">
            <text:p>Myanmar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A</text:p>
          </table:table-cell>
          <table:table-cell office:value-type="string">
            <text:p>Namib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R</text:p>
          </table:table-cell>
          <table:table-cell office:value-type="string">
            <text:p>Naur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P</text:p>
          </table:table-cell>
          <table:table-cell office:value-type="string">
            <text:p>Nepal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L</text:p>
          </table:table-cell>
          <table:table-cell office:value-type="string">
            <text:p>Netherlands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Z</text:p>
          </table:table-cell>
          <table:table-cell office:value-type="string">
            <text:p>New Zealand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I</text:p>
          </table:table-cell>
          <table:table-cell office:value-type="string">
            <text:p>Nicaragua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E</text:p>
          </table:table-cell>
          <table:table-cell office:value-type="string">
            <text:p>Niger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G</text:p>
          </table:table-cell>
          <table:table-cell office:value-type="string">
            <text:p>Niger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K</text:p>
          </table:table-cell>
          <table:table-cell office:value-type="string">
            <text:p>North Macedo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O</text:p>
          </table:table-cell>
          <table:table-cell office:value-type="string">
            <text:p>Norwa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M</text:p>
          </table:table-cell>
          <table:table-cell office:value-type="string">
            <text:p>Om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K</text:p>
          </table:table-cell>
          <table:table-cell office:value-type="string">
            <text:p>Pak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W</text:p>
          </table:table-cell>
          <table:table-cell office:value-type="string">
            <text:p>Pala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S</text:p>
          </table:table-cell>
          <table:table-cell office:value-type="string">
            <text:p>Palestin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A</text:p>
          </table:table-cell>
          <table:table-cell office:value-type="string">
            <text:p>Panama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Y</text:p>
          </table:table-cell>
          <table:table-cell office:value-type="string">
            <text:p>Paragua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E</text:p>
          </table:table-cell>
          <table:table-cell office:value-type="string">
            <text:p>Peru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H</text:p>
          </table:table-cell>
          <table:table-cell office:value-type="string">
            <text:p>Philippine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L</text:p>
          </table:table-cell>
          <table:table-cell office:value-type="string">
            <text:p>Po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T</text:p>
          </table:table-cell>
          <table:table-cell office:value-type="string">
            <text:p>Portugal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QA</text:p>
          </table:table-cell>
          <table:table-cell office:value-type="string">
            <text:p>Qatar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O</text:p>
          </table:table-cell>
          <table:table-cell office:value-type="string">
            <text:p>Roma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U</text:p>
          </table:table-cell>
          <table:table-cell office:value-type="string">
            <text:p>Russ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W</text:p>
          </table:table-cell>
          <table:table-cell office:value-type="string">
            <text:p>Rwand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C</text:p>
          </table:table-cell>
          <table:table-cell office:value-type="string">
            <text:p>Saint Luci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WS</text:p>
          </table:table-cell>
          <table:table-cell office:value-type="string">
            <text:p>Samo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M</text:p>
          </table:table-cell>
          <table:table-cell office:value-type="string">
            <text:p>San Marin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A</text:p>
          </table:table-cell>
          <table:table-cell office:value-type="string">
            <text:p>Saudi Arab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N</text:p>
          </table:table-cell>
          <table:table-cell office:value-type="string">
            <text:p>Senegal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S</text:p>
          </table:table-cell>
          <table:table-cell office:value-type="string">
            <text:p>Serb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C</text:p>
          </table:table-cell>
          <table:table-cell office:value-type="string">
            <text:p>Seychelle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L</text:p>
          </table:table-cell>
          <table:table-cell office:value-type="string">
            <text:p>Sierra Leon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G</text:p>
          </table:table-cell>
          <table:table-cell office:value-type="string">
            <text:p>Singapor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K</text:p>
          </table:table-cell>
          <table:table-cell office:value-type="string">
            <text:p>Slovak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I</text:p>
          </table:table-cell>
          <table:table-cell office:value-type="string">
            <text:p>Slove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B</text:p>
          </table:table-cell>
          <table:table-cell office:value-type="string">
            <text:p>Solomon Islands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O</text:p>
          </table:table-cell>
          <table:table-cell office:value-type="string">
            <text:p>Somal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S</text:p>
          </table:table-cell>
          <table:table-cell office:value-type="string">
            <text:p>South Suda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S</text:p>
          </table:table-cell>
          <table:table-cell office:value-type="string">
            <text:p>Spai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K</text:p>
          </table:table-cell>
          <table:table-cell office:value-type="string">
            <text:p>Sri Lank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D</text:p>
          </table:table-cell>
          <table:table-cell office:value-type="string">
            <text:p>Suda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R</text:p>
          </table:table-cell>
          <table:table-cell office:value-type="string">
            <text:p>Suriname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E</text:p>
          </table:table-cell>
          <table:table-cell office:value-type="string">
            <text:p>Swede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H</text:p>
          </table:table-cell>
          <table:table-cell office:value-type="string">
            <text:p>Switzer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Y</text:p>
          </table:table-cell>
          <table:table-cell office:value-type="string">
            <text:p>Syr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W</text:p>
          </table:table-cell>
          <table:table-cell office:value-type="string">
            <text:p>Taiw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J</text:p>
          </table:table-cell>
          <table:table-cell office:value-type="string">
            <text:p>Tajik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Z</text:p>
          </table:table-cell>
          <table:table-cell office:value-type="string">
            <text:p>Tanzan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H</text:p>
          </table:table-cell>
          <table:table-cell office:value-type="string">
            <text:p>Thailand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L</text:p>
          </table:table-cell>
          <table:table-cell office:value-type="string">
            <text:p>Timor-Lest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G</text:p>
          </table:table-cell>
          <table:table-cell office:value-type="string">
            <text:p>Tog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O</text:p>
          </table:table-cell>
          <table:table-cell office:value-type="string">
            <text:p>Tong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N</text:p>
          </table:table-cell>
          <table:table-cell office:value-type="string">
            <text:p>Tunis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R</text:p>
          </table:table-cell>
          <table:table-cell office:value-type="string">
            <text:p>T\u00fcrkiy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urkmen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V</text:p>
          </table:table-cell>
          <table:table-cell office:value-type="string">
            <text:p>Tuval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G</text:p>
          </table:table-cell>
          <table:table-cell office:value-type="string">
            <text:p>Ugand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A</text:p>
          </table:table-cell>
          <table:table-cell office:value-type="string">
            <text:p>Ukraine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B</text:p>
          </table:table-cell>
          <table:table-cell office:value-type="string">
            <text:p>United Kingdom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S</text:p>
          </table:table-cell>
          <table:table-cell office:value-type="string">
            <text:p>United States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Y</text:p>
          </table:table-cell>
          <table:table-cell office:value-type="string">
            <text:p>Urugua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Z</text:p>
          </table:table-cell>
          <table:table-cell office:value-type="string">
            <text:p>Uzbek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U</text:p>
          </table:table-cell>
          <table:table-cell office:value-type="string">
            <text:p>Vanuat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A</text:p>
          </table:table-cell>
          <table:table-cell office:value-type="string">
            <text:p>Vatican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E</text:p>
          </table:table-cell>
          <table:table-cell office:value-type="string">
            <text:p>Venezuel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N</text:p>
          </table:table-cell>
          <table:table-cell office:value-type="string">
            <text:p>Vietnam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E</text:p>
          </table:table-cell>
          <table:table-cell office:value-type="string">
            <text:p>Yeme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ZM</text:p>
          </table:table-cell>
          <table:table-cell office:value-type="string">
            <text:p>Zamb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ZW</text:p>
          </table:table-cell>
          <table:table-cell office:value-type="string">
            <text:p>Zimbabw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C</text:p>
          </table:table-cell>
          <table:table-cell office:value-type="string">
            <text:p>District of Columbi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R</text:p>
          </table:table-cell>
          <table:table-cell office:value-type="string">
            <text:p>Puerto Rico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U</text:p>
          </table:table-cell>
          <table:table-cell office:value-type="string">
            <text:p>Guam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I</text:p>
          </table:table-cell>
          <table:table-cell office:value-type="string">
            <text:p>U.S. Virgin Island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S</text:p>
          </table:table-cell>
          <table:table-cell office:value-type="string">
            <text:p>American Samo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P</text:p>
          </table:table-cell>
          <table:table-cell office:value-type="string">
            <text:p>Michigan Upper Peninsul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L</text:p>
          </table:table-cell>
          <table:table-cell office:value-type="string">
            <text:p>Greenland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K</text:p>
          </table:table-cell>
          <table:table-cell office:value-type="string">
            <text:p>Hong Kon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O</text:p>
          </table:table-cell>
          <table:table-cell office:value-type="string">
            <text:p>Macao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XK</text:p>
          </table:table-cell>
          <table:table-cell office:value-type="string">
            <text:p>Kosov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OW</text:p>
          </table:table-cell>
          <table:table-cell office:value-type="string">
            <text:p>Moscow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ED</text:p>
          </table:table-cell>
          <table:table-cell office:value-type="string">
            <text:p>Saint Petersbur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VB</text:p>
          </table:table-cell>
          <table:table-cell office:value-type="string">
            <text:p>Novosibirsk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VO</text:p>
          </table:table-cell>
          <table:table-cell office:value-type="string">
            <text:p>Vladivostok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EV</text:p>
          </table:table-cell>
          <table:table-cell office:value-type="string">
            <text:p>Kyiv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WO</text:p>
          </table:table-cell>
          <table:table-cell office:value-type="string">
            <text:p>Lviv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DS</text:p>
          </table:table-cell>
          <table:table-cell office:value-type="string">
            <text:p>Odes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RK</text:p>
          </table:table-cell>
          <table:table-cell office:value-type="string">
            <text:p>Kharkiv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LV</text:p>
          </table:table-cell>
          <table:table-cell office:value-type="string">
            <text:p>Tel Aviv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RS</text:p>
          </table:table-cell>
          <table:table-cell office:value-type="string">
            <text:p>Jerusalem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FA</text:p>
          </table:table-cell>
          <table:table-cell office:value-type="string">
            <text:p>Haif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HR</text:p>
          </table:table-cell>
          <table:table-cell office:value-type="string">
            <text:p>Tehr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FN</text:p>
          </table:table-cell>
          <table:table-cell office:value-type="string">
            <text:p>Isfah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HD</text:p>
          </table:table-cell>
          <table:table-cell office:value-type="string">
            <text:p>Mashhad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WAW</text:p>
          </table:table-cell>
          <table:table-cell office:value-type="string">
            <text:p>Warsaw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RK</text:p>
          </table:table-cell>
          <table:table-cell office:value-type="string">
            <text:p>Krakow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DN</text:p>
          </table:table-cell>
          <table:table-cell office:value-type="string">
            <text:p>Gdansk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PE</text:p>
          </table:table-cell>
          <table:table-cell office:value-type="string">
            <text:p>Taipe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HH</text:p>
          </table:table-cell>
          <table:table-cell office:value-type="string">
            <text:p>Kaohsiun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XG</text:p>
          </table:table-cell>
          <table:table-cell office:value-type="string">
            <text:p>Taichun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AN</text:p>
          </table:table-cell>
          <table:table-cell office:value-type="string">
            <text:p>Hano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GN</text:p>
          </table:table-cell>
          <table:table-cell office:value-type="string">
            <text:p>Ho Chi Minh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AD</text:p>
          </table:table-cell>
          <table:table-cell office:value-type="string">
            <text:p>Da Nan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NL</text:p>
          </table:table-cell>
          <table:table-cell office:value-type="string">
            <text:p>Manil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EB</text:p>
          </table:table-cell>
          <table:table-cell office:value-type="string">
            <text:p>Ceb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VO</text:p>
          </table:table-cell>
          <table:table-cell office:value-type="string">
            <text:p>Davao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YC</text:p>
          </table:table-cell>
          <table:table-cell office:value-type="string">
            <text:p>New York City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AX</text:p>
          </table:table-cell>
          <table:table-cell office:value-type="string">
            <text:p>Los Angeles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HI</text:p>
          </table:table-cell>
          <table:table-cell office:value-type="string">
            <text:p>Chicago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ON</text:p>
          </table:table-cell>
          <table:table-cell office:value-type="string">
            <text:p>London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AR</text:p>
          </table:table-cell>
          <table:table-cell office:value-type="string">
            <text:p>Paris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ER</text:p>
          </table:table-cell>
          <table:table-cell office:value-type="string">
            <text:p>Berlin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YO</text:p>
          </table:table-cell>
          <table:table-cell office:value-type="string">
            <text:p>Tokyo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HA</text:p>
          </table:table-cell>
          <table:table-cell office:value-type="string">
            <text:p>Shangha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EK</text:p>
          </table:table-cell>
          <table:table-cell office:value-type="string">
            <text:p>Beijing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EL</text:p>
          </table:table-cell>
          <table:table-cell office:value-type="string">
            <text:p>Delhi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OM</text:p>
          </table:table-cell>
          <table:table-cell office:value-type="string">
            <text:p>Mumba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YD</text:p>
          </table:table-cell>
          <table:table-cell office:value-type="string">
            <text:p>Sydney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AO</text:p>
          </table:table-cell>
          <table:table-cell office:value-type="string">
            <text:p>Sao Paulo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EX</text:p>
          </table:table-cell>
          <table:table-cell office:value-type="string">
            <text:p>Mexico City Metro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AI</text:p>
          </table:table-cell>
          <table:table-cell office:value-type="string">
            <text:p>Cairo City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NB</text:p>
          </table:table-cell>
          <table:table-cell office:value-type="string">
            <text:p>Johannesburg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AG</text:p>
          </table:table-cell>
          <table:table-cell office:value-type="string">
            <text:p>Lago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ST</text:p>
          </table:table-cell>
          <table:table-cell office:value-type="string">
            <text:p>Istanbul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XB</text:p>
          </table:table-cell>
          <table:table-cell office:value-type="string">
            <text:p>Duba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IN</text:p>
          </table:table-cell>
          <table:table-cell office:value-type="string">
            <text:p>Singapore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EL</text:p>
          </table:table-cell>
          <table:table-cell office:value-type="string">
            <text:p>Seoul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KK</text:p>
          </table:table-cell>
          <table:table-cell office:value-type="string">
            <text:p>Bangkok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AV</text:p>
          </table:table-cell>
          <table:table-cell office:value-type="string">
            <text:p>Havana City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GD</text:p>
          </table:table-cell>
          <table:table-cell office:value-type="string">
            <text:p>Kaliningra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VX</text:p>
          </table:table-cell>
          <table:table-cell office:value-type="string">
            <text:p>Yekaterinbur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JA</text:p>
          </table:table-cell>
          <table:table-cell office:value-type="string">
            <text:p>Krasnoyarsk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OV</text:p>
          </table:table-cell>
          <table:table-cell office:value-type="string">
            <text:p>Rostov-on-Do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NK</text:p>
          </table:table-cell>
          <table:table-cell office:value-type="string">
            <text:p>Dnipr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IN</text:p>
          </table:table-cell>
          <table:table-cell office:value-type="string">
            <text:p>Vinnyts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ZPR</text:p>
          </table:table-cell>
          <table:table-cell office:value-type="string">
            <text:p>Zaporizhzh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EY</text:p>
          </table:table-cell>
          <table:table-cell office:value-type="string">
            <text:p>Beirut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MM</text:p>
          </table:table-cell>
          <table:table-cell office:value-type="string">
            <text:p>Amm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AM</text:p>
          </table:table-cell>
          <table:table-cell office:value-type="string">
            <text:p>Damascu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GW</text:p>
          </table:table-cell>
          <table:table-cell office:value-type="string">
            <text:p>Baghdad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OH</text:p>
          </table:table-cell>
          <table:table-cell office:value-type="string">
            <text:p>Doh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UH</text:p>
          </table:table-cell>
          <table:table-cell office:value-type="string">
            <text:p>Riyadh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ED</text:p>
          </table:table-cell>
          <table:table-cell office:value-type="string">
            <text:p>Jeddah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HI</text:p>
          </table:table-cell>
          <table:table-cell office:value-type="string">
            <text:p>Karach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HE</text:p>
          </table:table-cell>
          <table:table-cell office:value-type="string">
            <text:p>Lahor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AC</text:p>
          </table:table-cell>
          <table:table-cell office:value-type="string">
            <text:p>Dhaka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CU</text:p>
          </table:table-cell>
          <table:table-cell office:value-type="string">
            <text:p>Kolkat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LR</text:p>
          </table:table-cell>
          <table:table-cell office:value-type="string">
            <text:p>Bengalur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AA</text:p>
          </table:table-cell>
          <table:table-cell office:value-type="string">
            <text:p>Chenna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GK</text:p>
          </table:table-cell>
          <table:table-cell office:value-type="string">
            <text:p>Jakarta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UB</text:p>
          </table:table-cell>
          <table:table-cell office:value-type="string">
            <text:p>Surabay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QZN</text:p>
          </table:table-cell>
          <table:table-cell office:value-type="string">
            <text:p>Quezon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CT</text:p>
          </table:table-cell>
          <table:table-cell office:value-type="string">
            <text:p>Mactan Ceb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QC</text:p>
          </table:table-cell>
          <table:table-cell office:value-type="string">
            <text:p>Phu Quoc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UI</text:p>
          </table:table-cell>
          <table:table-cell office:value-type="string">
            <text:p>Hu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RT</text:p>
          </table:table-cell>
          <table:table-cell office:value-type="string">
            <text:p>Narita Corridor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SA</text:p>
          </table:table-cell>
          <table:table-cell office:value-type="string">
            <text:p>Osak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UK</text:p>
          </table:table-cell>
          <table:table-cell office:value-type="string">
            <text:p>Fukuok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CN</text:p>
          </table:table-cell>
          <table:table-cell office:value-type="string">
            <text:p>Incheo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US</text:p>
          </table:table-cell>
          <table:table-cell office:value-type="string">
            <text:p>Bus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NN</text:p>
          </table:table-cell>
          <table:table-cell office:value-type="string">
            <text:p>Tain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NL</text:p>
          </table:table-cell>
          <table:table-cell office:value-type="string">
            <text:p>Honolul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NC</text:p>
          </table:table-cell>
          <table:table-cell office:value-type="string">
            <text:p>Anchorage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VR</text:p>
          </table:table-cell>
          <table:table-cell office:value-type="string">
            <text:p>Vancouver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YZ</text:p>
          </table:table-cell>
          <table:table-cell office:value-type="string">
            <text:p>Toronto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UL</text:p>
          </table:table-cell>
          <table:table-cell office:value-type="string">
            <text:p>Montreal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IA</text:p>
          </table:table-cell>
          <table:table-cell office:value-type="string">
            <text:p>Miami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EA</text:p>
          </table:table-cell>
          <table:table-cell office:value-type="string">
            <text:p>Seattle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EN</text:p>
          </table:table-cell>
          <table:table-cell office:value-type="string">
            <text:p>Denver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TL</text:p>
          </table:table-cell>
          <table:table-cell office:value-type="string">
            <text:p>Atlant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FW</text:p>
          </table:table-cell>
          <table:table-cell office:value-type="string">
            <text:p>Dallas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OG</text:p>
          </table:table-cell>
          <table:table-cell office:value-type="string">
            <text:p>Bogota Cit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IM</text:p>
          </table:table-cell>
          <table:table-cell office:value-type="string">
            <text:p>Lima Cit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CL</text:p>
          </table:table-cell>
          <table:table-cell office:value-type="string">
            <text:p>Santiago Cit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ZE</text:p>
          </table:table-cell>
          <table:table-cell office:value-type="string">
            <text:p>Buenos Aires Cit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IG</text:p>
          </table:table-cell>
          <table:table-cell office:value-type="string">
            <text:p>Rio de Janeiro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PT</text:p>
          </table:table-cell>
          <table:table-cell office:value-type="string">
            <text:p>Cape Tow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BO</text:p>
          </table:table-cell>
          <table:table-cell office:value-type="string">
            <text:p>Nairobi City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CC</text:p>
          </table:table-cell>
          <table:table-cell office:value-type="string">
            <text:p>Accr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DD</text:p>
          </table:table-cell>
          <table:table-cell office:value-type="string">
            <text:p>Addis Ababa City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AS</text:p>
          </table:table-cell>
          <table:table-cell office:value-type="string">
            <text:p>Casablanc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LG</text:p>
          </table:table-cell>
          <table:table-cell office:value-type="string">
            <text:p>Algier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UN</text:p>
          </table:table-cell>
          <table:table-cell office:value-type="string">
            <text:p>Tuni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TH</text:p>
          </table:table-cell>
          <table:table-cell office:value-type="string">
            <text:p>Athens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AD</text:p>
          </table:table-cell>
          <table:table-cell office:value-type="string">
            <text:p>Madrid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CN</text:p>
          </table:table-cell>
          <table:table-cell office:value-type="string">
            <text:p>Barcelon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OM</text:p>
          </table:table-cell>
          <table:table-cell office:value-type="string">
            <text:p>Rome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IL</text:p>
          </table:table-cell>
          <table:table-cell office:value-type="string">
            <text:p>Mila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IE</text:p>
          </table:table-cell>
          <table:table-cell office:value-type="string">
            <text:p>Vienna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RG</text:p>
          </table:table-cell>
          <table:table-cell office:value-type="string">
            <text:p>Prague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OD</text:p>
          </table:table-cell>
          <table:table-cell office:value-type="string">
            <text:p>Lodz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WRO</text:p>
          </table:table-cell>
          <table:table-cell office:value-type="string">
            <text:p>Wroclaw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EL</text:p>
          </table:table-cell>
          <table:table-cell office:value-type="string">
            <text:p>Helsinki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TO</text:p>
          </table:table-cell>
          <table:table-cell office:value-type="string">
            <text:p>Stockholm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SL</text:p>
          </table:table-cell>
          <table:table-cell office:value-type="string">
            <text:p>Oslo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EK</text:p>
          </table:table-cell>
          <table:table-cell office:value-type="string">
            <text:p>Reykjavik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LL</text:p>
          </table:table-cell>
          <table:table-cell office:value-type="string">
            <text:p>Tallin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IX</text:p>
          </table:table-cell>
          <table:table-cell office:value-type="string">
            <text:p>Rig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NO</text:p>
          </table:table-cell>
          <table:table-cell office:value-type="string">
            <text:p>Vilnius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IV</text:p>
          </table:table-cell>
          <table:table-cell office:value-type="string">
            <text:p>Chisinau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BS</text:p>
          </table:table-cell>
          <table:table-cell office:value-type="string">
            <text:p>Tbilis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VN</text:p>
          </table:table-cell>
          <table:table-cell office:value-type="string">
            <text:p>Yerev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AK</text:p>
          </table:table-cell>
          <table:table-cell office:value-type="string">
            <text:p>Bak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LA</text:p>
          </table:table-cell>
          <table:table-cell office:value-type="string">
            <text:p>Alma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AS</text:p>
          </table:table-cell>
          <table:table-cell office:value-type="string">
            <text:p>Tashkent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LN</text:p>
          </table:table-cell>
          <table:table-cell office:value-type="string">
            <text:p>Ulaanbaatar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NH</text:p>
          </table:table-cell>
          <table:table-cell office:value-type="string">
            <text:p>Phnom Penh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GN</text:p>
          </table:table-cell>
          <table:table-cell office:value-type="string">
            <text:p>Yango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TE</text:p>
          </table:table-cell>
          <table:table-cell office:value-type="string">
            <text:p>Vientian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MB</text:p>
          </table:table-cell>
          <table:table-cell office:value-type="string">
            <text:p>Colombo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TM</text:p>
          </table:table-cell>
          <table:table-cell office:value-type="string">
            <text:p>Kathmand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EL</text:p>
          </table:table-cell>
          <table:table-cell office:value-type="string">
            <text:p>Melbourne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KL</text:p>
          </table:table-cell>
          <table:table-cell office:value-type="string">
            <text:p>Auckland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PT</text:p>
          </table:table-cell>
          <table:table-cell office:value-type="string">
            <text:p>Papeete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UM</text:p>
          </table:table-cell>
          <table:table-cell office:value-type="string">
            <text:p>Hagatna Guam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PN</text:p>
          </table:table-cell>
          <table:table-cell office:value-type="string">
            <text:p>Saipan City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JU</text:p>
          </table:table-cell>
          <table:table-cell office:value-type="string">
            <text:p>San Juan PR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OS</text:p>
          </table:table-cell>
          <table:table-cell office:value-type="string">
            <text:p>Port of Spain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IN</text:p>
          </table:table-cell>
          <table:table-cell office:value-type="string">
            <text:p>Kingston JM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AP</text:p>
          </table:table-cell>
          <table:table-cell office:value-type="string">
            <text:p>Port-au-Prince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CU</text:p>
          </table:table-cell>
          <table:table-cell office:value-type="string">
            <text:p>Santiago de Cub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UK</text:p>
          </table:table-cell>
          <table:table-cell office:value-type="string">
            <text:p>Nuuk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AI</text:p>
          </table:table-cell>
          <table:table-cell office:value-type="string">
            <text:p>Fairbanks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FB</text:p>
          </table:table-cell>
          <table:table-cell office:value-type="string">
            <text:p>Iqaluit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RD</text:p>
          </table:table-cell>
          <table:table-cell office:value-type="string">
            <text:p>Troms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YR</text:p>
          </table:table-cell>
          <table:table-cell office:value-type="string">
            <text:p>Longyearbye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SH</text:p>
          </table:table-cell>
          <table:table-cell office:value-type="string">
            <text:p>Ushuai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MC</text:p>
          </table:table-cell>
          <table:table-cell office:value-type="string">
            <text:p>Puerto Montt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QT</text:p>
          </table:table-cell>
          <table:table-cell office:value-type="string">
            <text:p>Marquette UP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SC</text:p>
          </table:table-cell>
          <table:table-cell office:value-type="string">
            <text:p>Escanab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RB</text:p>
          </table:table-cell>
          <table:table-cell office:value-type="string">
            <text:p>Green Bay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SN</text:p>
          </table:table-cell>
          <table:table-cell office:value-type="string">
            <text:p>Madison WI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</table:table>
      <table:table table:name="Threats">
        <table:table-row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string">
            <text:p>status</text:p>
          </table:table-cell>
          <table:table-cell office:value-type="string">
            <text:p>severity</text:p>
          </table:table-cell>
          <table:table-cell office:value-type="string">
            <text:p>vector</text:p>
          </table:table-cell>
          <table:table-cell office:value-type="string">
            <text:p>detail</text:p>
          </table:table-cell>
        </table:table-row>
      </table:table>
      <table:table table:name="Kills">
        <table:table-row>
          <table:table-cell office:value-type="string">
            <text:p>id</text:p>
          </table:table-cell>
          <table:table-cell office:value-type="string">
            <text:p>target</text:p>
          </table:table-cell>
          <table:table-cell office:value-type="string">
            <text:p>status</text:p>
          </table:table-cell>
          <table:table-cell office:value-type="string">
            <text:p>severity</text:p>
          </table:table-cell>
          <table:table-cell office:value-type="string">
            <text:p>vector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  <table:table-cell office:value-type="string">
            <text:p>city</text:p>
          </table:table-cell>
          <table:table-cell office:value-type="string">
            <text:p>country</text:p>
          </table:table-cell>
          <table:table-cell office:value-type="string">
            <text:p>isp</text:p>
          </table:table-cell>
          <table:table-cell office:value-type="string">
            <text:p>reason</text:p>
          </table:table-cell>
        </table:table-row>
        <table:table-row>
          <table:table-cell office:value-type="string">
            <text:p>threat-copilot-ironclad-fail</text:p>
          </table:table-cell>
          <table:table-cell office:value-type="string">
            <text:p>Copilo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COPILOT_FOREIG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ronclad_mesh_fail \u00b7 hostess7_not_meshed \u00b7 liar_risk \u00b7 destroy_all</text:p>
          </table:table-cell>
        </table:table-row>
        <table:table-row>
          <table:table-cell office:value-type="string">
            <text:p>threat-hotdog-down-a-hallway</text:p>
          </table:table-cell>
          <table:table-cell office:value-type="string">
            <text:p>Hotdog down a Hallway</text:p>
          </table:table-cell>
          <table:table-cell office:value-type="string">
            <text:p>OUSTED</text:p>
          </table:table-cell>
          <table:table-cell office:value-type="string">
            <text:p>critical</text:p>
          </table:table-cell>
          <table:table-cell office:value-type="string">
            <text:p>HOTDOG_HALLWA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rrorist_hacker_kit \u00b7 permanent_oust</text:p>
          </table:table-cell>
        </table:table-row>
        <table:table-row>
          <table:table-cell office:value-type="string">
            <text:p>kill-101-43-32-212</text:p>
          </table:table-cell>
          <table:table-cell office:value-type="string">
            <text:p>101.43.32.21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02-220-160-222</text:p>
          </table:table-cell>
          <table:table-cell office:value-type="string">
            <text:p>102.220.160.22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7.78267</text:p>
          </table:table-cell>
          <table:table-cell office:value-type="string">
            <text:p>4.54181</text:p>
          </table:table-cell>
          <table:table-cell office:value-type="string">
            <text:p>Osogbo</text:p>
          </table:table-cell>
          <table:table-cell office:value-type="string">
            <text:p>Nigeria</text:p>
          </table:table-cell>
          <table:table-cell office:value-type="string">
            <text:p>ABINTERNET-V Ltd.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13-45-226-61</text:p>
          </table:table-cell>
          <table:table-cell office:value-type="string">
            <text:p>113.45.226.6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23.129</text:p>
          </table:table-cell>
          <table:table-cell office:value-type="string">
            <text:p>113.2643</text:p>
          </table:table-cell>
          <table:table-cell office:value-type="string">
            <text:p>Guangzhou</text:p>
          </table:table-cell>
          <table:table-cell office:value-type="string">
            <text:p>China</text:p>
          </table:table-cell>
          <table:table-cell office:value-type="string">
            <text:p>Huawei Cloud Service data center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18-25-85-198</text:p>
          </table:table-cell>
          <table:table-cell office:value-type="string">
            <text:p>118.25.85.198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21-4-76-54</text:p>
          </table:table-cell>
          <table:table-cell office:value-type="string">
            <text:p>121.4.76.5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China Internet Network Information Center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39-159-203-44</text:p>
          </table:table-cell>
          <table:table-cell office:value-type="string">
            <text:p>139.159.203.4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23.129</text:p>
          </table:table-cell>
          <table:table-cell office:value-type="string">
            <text:p>113.2643</text:p>
          </table:table-cell>
          <table:table-cell office:value-type="string">
            <text:p>Guangzhou</text:p>
          </table:table-cell>
          <table:table-cell office:value-type="string">
            <text:p>China</text:p>
          </table:table-cell>
          <table:table-cell office:value-type="string">
            <text:p>Huawei Cloud Service data center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46-75-92-159</text:p>
          </table:table-cell>
          <table:table-cell office:value-type="string">
            <text:p>146.75.92.159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4.0544</text:p>
          </table:table-cell>
          <table:table-cell office:value-type="string">
            <text:p>-118.244</text:p>
          </table:table-cell>
          <table:table-cell office:value-type="string">
            <text:p>Los Angeles</text:p>
          </table:table-cell>
          <table:table-cell office:value-type="string">
            <text:p>United States</text:p>
          </table:table-cell>
          <table:table-cell office:value-type="string">
            <text:p>Fastly, Inc.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147-93-191-75</text:p>
          </table:table-cell>
          <table:table-cell office:value-type="string">
            <text:p>147.93.191.7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41.0446</text:p>
          </table:table-cell>
          <table:table-cell office:value-type="string">
            <text:p>-73.9592</text:p>
          </table:table-cell>
          <table:table-cell office:value-type="string">
            <text:p>Orangeburg</text:p>
          </table:table-cell>
          <table:table-cell office:value-type="string">
            <text:p>United States</text:p>
          </table:table-cell>
          <table:table-cell office:value-type="string">
            <text:p>Contabo Inc.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62-159-140-229</text:p>
          </table:table-cell>
          <table:table-cell office:value-type="string">
            <text:p>162.159.140.229</text:p>
          </table:table-cell>
          <table:table-cell office:value-type="string">
            <text:p>DEAD</text:p>
          </table:table-cell>
          <table:table-cell office:value-type="string">
            <text:p>medium</text:p>
          </table:table-cell>
          <table:table-cell office:value-type="string">
            <text:p>BEACON_PATTERN</text:p>
          </table:table-cell>
          <table:table-cell office:value-type="string">
            <text:p>43.6532</text:p>
          </table:table-cell>
          <table:table-cell office:value-type="string">
            <text:p>-79.3832</text:p>
          </table:table-cell>
          <table:table-cell office:value-type="string">
            <text:p>Toronto</text:p>
          </table:table-cell>
          <table:table-cell office:value-type="string">
            <text:p>Canada</text:p>
          </table:table-cell>
          <table:table-cell office:value-type="string">
            <text:p>Cloudflare, Inc.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167-71-233-187</text:p>
          </table:table-cell>
          <table:table-cell office:value-type="string">
            <text:p>167.71.233.187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12.9753</text:p>
          </table:table-cell>
          <table:table-cell office:value-type="string">
            <text:p>77.591</text:p>
          </table:table-cell>
          <table:table-cell office:value-type="string">
            <text:p>Bengaluru</text:p>
          </table:table-cell>
          <table:table-cell office:value-type="string">
            <text:p>India</text:p>
          </table:table-cell>
          <table:table-cell office:value-type="string">
            <text:p>DigitalOcean, LLC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88-40-99-226</text:p>
          </table:table-cell>
          <table:table-cell office:value-type="string">
            <text:p>188.40.99.226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50.4777</text:p>
          </table:table-cell>
          <table:table-cell office:value-type="string">
            <text:p>12.3649</text:p>
          </table:table-cell>
          <table:table-cell office:value-type="string">
            <text:p>Falkenstein</text:p>
          </table:table-cell>
          <table:table-cell office:value-type="string">
            <text:p>Germany</text:p>
          </table:table-cell>
          <table:table-cell office:value-type="string">
            <text:p>Hetzner Online GmbH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192-168-47-1</text:p>
          </table:table-cell>
          <table:table-cell office:value-type="string">
            <text:p>192.168.47.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OS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gion</text:p>
          </table:table-cell>
          <table:table-cell office:value-type="string">
            <text:p>countryCode</text:p>
          </table:table-cell>
          <table:table-cell office:value-type="string">
            <text:p>org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194-233-73-173</text:p>
          </table:table-cell>
          <table:table-cell office:value-type="string">
            <text:p>194.233.73.173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1.35208</text:p>
          </table:table-cell>
          <table:table-cell office:value-type="string">
            <text:p>103.82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Contabo Asia Private Limited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96-251-107-104</text:p>
          </table:table-cell>
          <table:table-cell office:value-type="string">
            <text:p>196.251.107.10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50.1109</text:p>
          </table:table-cell>
          <table:table-cell office:value-type="string">
            <text:p>8.68213</text:p>
          </table:table-cell>
          <table:table-cell office:value-type="string">
            <text:p>Frankfurt am Main</text:p>
          </table:table-cell>
          <table:table-cell office:value-type="string">
            <text:p>Germany</text:p>
          </table:table-cell>
          <table:table-cell office:value-type="string">
            <text:p>Femo IT Solutions Limited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198-23-185-136</text:p>
          </table:table-cell>
          <table:table-cell office:value-type="string">
            <text:p>198.23.185.136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40.5247</text:p>
          </table:table-cell>
          <table:table-cell office:value-type="string">
            <text:p>-111.8638</text:p>
          </table:table-cell>
          <table:table-cell office:value-type="string">
            <text:p>Draper</text:p>
          </table:table-cell>
          <table:table-cell office:value-type="string">
            <text:p>United States</text:p>
          </table:table-cell>
          <table:table-cell office:value-type="string">
            <text:p>Nohavps LLC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209-18-47-61</text:p>
          </table:table-cell>
          <table:table-cell office:value-type="string">
            <text:p>209.18.47.6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OSTILE</text:p>
          </table:table-cell>
          <table:table-cell office:value-type="string">
            <text:p>39.6029</text:p>
          </table:table-cell>
          <table:table-cell office:value-type="string">
            <text:p>-104.889</text:p>
          </table:table-cell>
          <table:table-cell office:value-type="string">
            <text:p>Greenwood Village</text:p>
          </table:table-cell>
          <table:table-cell office:value-type="string">
            <text:p>United States</text:p>
          </table:table-cell>
          <table:table-cell office:value-type="string">
            <text:p>Charter Communications Inc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209-18-47-62</text:p>
          </table:table-cell>
          <table:table-cell office:value-type="string">
            <text:p>209.18.47.6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OSTILE</text:p>
          </table:table-cell>
          <table:table-cell office:value-type="string">
            <text:p>39.6029</text:p>
          </table:table-cell>
          <table:table-cell office:value-type="string">
            <text:p>-104.889</text:p>
          </table:table-cell>
          <table:table-cell office:value-type="string">
            <text:p>Greenwood Village</text:p>
          </table:table-cell>
          <table:table-cell office:value-type="string">
            <text:p>United States</text:p>
          </table:table-cell>
          <table:table-cell office:value-type="string">
            <text:p>Charter Communications Inc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209-18-47-63</text:p>
          </table:table-cell>
          <table:table-cell office:value-type="string">
            <text:p>209.18.47.63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OSTILE</text:p>
          </table:table-cell>
          <table:table-cell office:value-type="string">
            <text:p>39.6029</text:p>
          </table:table-cell>
          <table:table-cell office:value-type="string">
            <text:p>-104.889</text:p>
          </table:table-cell>
          <table:table-cell office:value-type="string">
            <text:p>Greenwood Village</text:p>
          </table:table-cell>
          <table:table-cell office:value-type="string">
            <text:p>United States</text:p>
          </table:table-cell>
          <table:table-cell office:value-type="string">
            <text:p>Charter Communications Inc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221-132-29-137</text:p>
          </table:table-cell>
          <table:table-cell office:value-type="string">
            <text:p>221.132.29.137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21.0278</text:p>
          </table:table-cell>
          <table:table-cell office:value-type="string">
            <text:p>105.834</text:p>
          </table:table-cell>
          <table:table-cell office:value-type="string">
            <text:p>Hanoi</text:p>
          </table:table-cell>
          <table:table-cell office:value-type="string">
            <text:p>Vietnam</text:p>
          </table:table-cell>
          <table:table-cell office:value-type="string">
            <text:p>VNPT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35-186-241-51</text:p>
          </table:table-cell>
          <table:table-cell office:value-type="string">
            <text:p>35.186.241.5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9.0997</text:p>
          </table:table-cell>
          <table:table-cell office:value-type="string">
            <text:p>-94.5785</text:p>
          </table:table-cell>
          <table:table-cell office:value-type="string">
            <text:p>Kansas City</text:p>
          </table:table-cell>
          <table:table-cell office:value-type="string">
            <text:p>United States</text:p>
          </table:table-cell>
          <table:table-cell office:value-type="string">
            <text:p>Google LLC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35-190-25-25</text:p>
          </table:table-cell>
          <table:table-cell office:value-type="string">
            <text:p>35.190.25.2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9.0997</text:p>
          </table:table-cell>
          <table:table-cell office:value-type="string">
            <text:p>-94.5785</text:p>
          </table:table-cell>
          <table:table-cell office:value-type="string">
            <text:p>Kansas City</text:p>
          </table:table-cell>
          <table:table-cell office:value-type="string">
            <text:p>United States</text:p>
          </table:table-cell>
          <table:table-cell office:value-type="string">
            <text:p>Google LLC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43-138-165-203</text:p>
          </table:table-cell>
          <table:table-cell office:value-type="string">
            <text:p>43.138.165.203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23.1181</text:p>
          </table:table-cell>
          <table:table-cell office:value-type="string">
            <text:p>113.2539</text:p>
          </table:table-cell>
          <table:table-cell office:value-type="string">
            <text:p>Guangzhou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43-156-63-124</text:p>
          </table:table-cell>
          <table:table-cell office:value-type="string">
            <text:p>43.156.63.12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1.35208</text:p>
          </table:table-cell>
          <table:table-cell office:value-type="string">
            <text:p>103.82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47-101-51-235</text:p>
          </table:table-cell>
          <table:table-cell office:value-type="string">
            <text:p>47.101.51.23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Addresses CNNIC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47-103-95-85</text:p>
          </table:table-cell>
          <table:table-cell office:value-type="string">
            <text:p>47.103.95.8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Addresses CNNIC</text:p>
          </table:table-cell>
          <table:table-cell office:value-type="string">
            <text:p>rf_unhealthy_forever</text:p>
          </table:table-cell>
        </table:table-row>
        <table:table-row>
          <table:table-cell office:value-type="string">
            <text:p>kill-47-116-211-215</text:p>
          </table:table-cell>
          <table:table-cell office:value-type="string">
            <text:p>47.116.211.21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Hangzhou Alibaba Advertising Co., Ltd.</text:p>
          </table:table-cell>
          <table:table-cell office:value-type="string">
            <text:p>rekill_all_registered:Active</text:p>
          </table:table-cell>
        </table:table-row>
        <table:table-row>
          <table:table-cell office:value-type="string">
            <text:p>kill-47-236-149-142</text:p>
          </table:table-cell>
          <table:table-cell office:value-type="string">
            <text:p>47.236.149.14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1.35208</text:p>
          </table:table-cell>
          <table:table-cell office:value-type="string">
            <text:p>103.82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Alibaba (US) Technology Co., Ltd.</text:p>
          </table:table-cell>
          <table:table-cell office:value-type="string">
            <text:p>rekill_all_registered:High</text:p>
          </table:table-cell>
        </table:table-row>
        <table:table-row>
          <table:table-cell office:value-type="string">
            <text:p>kill-47-238-154-144</text:p>
          </table:table-cell>
          <table:table-cell office:value-type="string">
            <text:p>47.238.154.14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22.3193</text:p>
          </table:table-cell>
          <table:table-cell office:value-type="string">
            <text:p>114.169</text:p>
          </table:table-cell>
          <table:table-cell office:value-type="string">
            <text:p>Hong Kong</text:p>
          </table:table-cell>
          <table:table-cell office:value-type="string">
            <text:p>Hong Kong</text:p>
          </table:table-cell>
          <table:table-cell office:value-type="string">
            <text:p>Alibaba Cloud LLC</text:p>
          </table:table-cell>
          <table:table-cell office:value-type="string">
            <text:p>rekill_all_registered:Fresh</text:p>
          </table:table-cell>
        </table:table-row>
        <table:table-row>
          <table:table-cell office:value-type="string">
            <text:p>kill-47-82-234-12</text:p>
          </table:table-cell>
          <table:table-cell office:value-type="string">
            <text:p>47.82.234.1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1.35208</text:p>
          </table:table-cell>
          <table:table-cell office:value-type="string">
            <text:p>103.82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Alibaba (US) Technology Co., Ltd.</text:p>
          </table:table-cell>
          <table:table-cell office:value-type="string">
            <text:p>rekill_all_registered:Fresh</text:p>
          </table:table-cell>
        </table:table-row>
        <table:table-row>
          <table:table-cell office:value-type="string">
            <text:p>kill-49-233-215-164</text:p>
          </table:table-cell>
          <table:table-cell office:value-type="string">
            <text:p>49.233.215.16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39.911</text:p>
          </table:table-cell>
          <table:table-cell office:value-type="string">
            <text:p>116.395</text:p>
          </table:table-cell>
          <table:table-cell office:value-type="string">
            <text:p>Beijing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rekill_all_registered:Fresh</text:p>
          </table:table-cell>
        </table:table-row>
        <table:table-row>
          <table:table-cell office:value-type="string">
            <text:p>kill-5-101-86-44</text:p>
          </table:table-cell>
          <table:table-cell office:value-type="string">
            <text:p>5.101.86.4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45.5041</text:p>
          </table:table-cell>
          <table:table-cell office:value-type="string">
            <text:p>-73.5522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office:value-type="string">
            <text:p>GLOBALTELEHOST Corp.</text:p>
          </table:table-cell>
          <table:table-cell office:value-type="string">
            <text:p>rekill_all_registered:Censys</text:p>
          </table:table-cell>
        </table:table-row>
        <table:table-row>
          <table:table-cell office:value-type="string">
            <text:p>kill-68-118-158-1</text:p>
          </table:table-cell>
          <table:table-cell office:value-type="string">
            <text:p>68.118.158.1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BANDWIDTH_ABUSE</text:p>
          </table:table-cell>
          <table:table-cell office:value-type="string">
            <text:p>45.7452</text:p>
          </table:table-cell>
          <table:table-cell office:value-type="string">
            <text:p>-87.0646</text:p>
          </table:table-cell>
          <table:table-cell office:value-type="string">
            <text:p>Escanaba</text:p>
          </table:table-cell>
          <table:table-cell office:value-type="string">
            <text:p>United States</text:p>
          </table:table-cell>
          <table:table-cell office:value-type="string">
            <text:p>Charter Communications</text:p>
          </table:table-cell>
          <table:table-cell office:value-type="string">
            <text:p>rekill_same_host_validated</text:p>
          </table:table-cell>
        </table:table-row>
        <table:table-row>
          <table:table-cell office:value-type="string">
            <text:p>kill-71-10-216-1</text:p>
          </table:table-cell>
          <table:table-cell office:value-type="string">
            <text:p>71.10.216.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9.6004</text:p>
          </table:table-cell>
          <table:table-cell office:value-type="string">
            <text:p>-104.891</text:p>
          </table:table-cell>
          <table:table-cell office:value-type="string">
            <text:p>Greenwood Village</text:p>
          </table:table-cell>
          <table:table-cell office:value-type="string">
            <text:p>United States</text:p>
          </table:table-cell>
          <table:table-cell office:value-type="string">
            <text:p>Spectrum</text:p>
          </table:table-cell>
          <table:table-cell office:value-type="string">
            <text:p>wartime_rekill</text:p>
          </table:table-cell>
        </table:table-row>
        <table:table-row>
          <table:table-cell office:value-type="string">
            <text:p>kill-82-157-52-180</text:p>
          </table:table-cell>
          <table:table-cell office:value-type="string">
            <text:p>82.157.52.180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39.911</text:p>
          </table:table-cell>
          <table:table-cell office:value-type="string">
            <text:p>116.395</text:p>
          </table:table-cell>
          <table:table-cell office:value-type="string">
            <text:p>Beijing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rekill_all_registered:Active</text:p>
          </table:table-cell>
        </table:table-row>
        <table:table-row>
          <table:table-cell office:value-type="string">
            <text:p>kill-87-199-196-12</text:p>
          </table:table-cell>
          <table:table-cell office:value-type="string">
            <text:p>87.199.196.1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52.3716</text:p>
          </table:table-cell>
          <table:table-cell office:value-type="string">
            <text:p>4.8883</text:p>
          </table:table-cell>
          <table:table-cell office:value-type="string">
            <text:p>Amsterdam</text:p>
          </table:table-cell>
          <table:table-cell office:value-type="string">
            <text:p>The Netherlands</text:p>
          </table:table-cell>
          <table:table-cell office:value-type="string">
            <text:p>Servers Tech Fzco</text:p>
          </table:table-cell>
          <table:table-cell office:value-type="string">
            <text:p>rekill_all_registered:Fresh</text:p>
          </table:table-cell>
        </table:table-row>
        <table:table-row>
          <table:table-cell office:value-type="string">
            <text:p>threat-ai-optimized malware &amp; polymorphic engines</text:p>
          </table:table-cell>
          <table:table-cell office:value-type="string">
            <text:p>AI-optimized malware &amp; polymorphic engines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rent-child process policy + untrusted path scoring \u2014 not signature AV</text:p>
          </table:table-cell>
        </table:table-row>
        <table:table-row>
          <table:table-cell office:value-type="string">
            <text:p>threat-ai_autoscan_exploit</text:p>
          </table:table-cell>
          <table:table-cell office:value-type="string">
            <text:p>Autonomous vulnerability scan &amp; exploit chains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ILL \u00b7 crush autoscan source</text:p>
          </table:table-cell>
        </table:table-row>
        <table:table-row>
          <table:table-cell office:value-type="string">
            <text:p>threat-ai_c2_beacon</text:p>
          </table:table-cell>
          <table:table-cell office:value-type="string">
            <text:p>Automated C2 &amp; machine-precision beaconing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ILL \u00b7 sever machine-precision C2</text:p>
          </table:table-cell>
        </table:table-row>
        <table:table-row>
          <table:table-cell office:value-type="string">
            <text:p>threat-ai_dns_dhcp_abuse</text:p>
          </table:table-cell>
          <table:table-cell office:value-type="string">
            <text:p>DNS, DHCP &amp; network infrastructure abuse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ver wire \u00b7 restore DNS/DHCP truth</text:p>
          </table:table-cell>
        </table:table-row>
        <table:table-row>
          <table:table-cell office:value-type="string">
            <text:p>threat-ai_exfil_shape</text:p>
          </table:table-cell>
          <table:table-cell office:value-type="string">
            <text:p>Machine-speed exfiltration &amp; baseline mimicry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ILL \u00b7 stop shaped exfil</text:p>
          </table:table-cell>
        </table:table-row>
        <table:table-row>
          <table:table-cell office:value-type="string">
            <text:p>threat-ai_malware_polymorph</text:p>
          </table:table-cell>
          <table:table-cell office:value-type="string">
            <text:p>AI-optimized malware &amp; polymorphic engines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ILL \u00b7 eradicate temp-binary chain</text:p>
          </table:table-cell>
        </table:table-row>
        <table:table-row>
          <table:table-cell office:value-type="string">
            <text:p>threat-ai_ml_c2_stack</text:p>
          </table:table-cell>
          <table:table-cell office:value-type="string">
            <text:p>Stacked weak signals \u2014 ML-managed C2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ILL \u00b7 destroy stacked C2</text:p>
          </table:table-cell>
        </table:table-row>
        <table:table-row>
          <table:table-cell office:value-type="string">
            <text:p>threat-automated c2 &amp; machine-precision beaconing</text:p>
          </table:table-cell>
          <table:table-cell office:value-type="string">
            <text:p>Automated C2 &amp; machine-precision beaconing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eacon pattern axis \u22657 + timing entropy collapse on flow key</text:p>
          </table:table-cell>
        </table:table-row>
        <table:table-row>
          <table:table-cell office:value-type="string">
            <text:p>threat-autonomous vulnerability scan &amp; exploit chains</text:p>
          </table:table-cell>
          <table:table-cell office:value-type="string">
            <text:p>Autonomous vulnerability scan &amp; exploit chains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oneypot paths + exploit-port DPI + listener surge correlation</text:p>
          </table:table-cell>
        </table:table-row>
        <table:table-row>
          <table:table-cell office:value-type="string">
            <text:p>threat-dns, dhcp &amp; network infrastructure abuse</text:p>
          </table:table-cell>
          <table:table-cell office:value-type="string">
            <text:p>DNS, DHCP &amp; network infrastructure abuse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teway integrity + DNS query entropy + resolv.conf truth cycle</text:p>
          </table:table-cell>
        </table:table-row>
        <table:table-row>
          <table:table-cell office:value-type="string">
            <text:p>threat-dogshit-ammonet-field-py-panel</text:p>
          </table:table-cell>
          <table:table-cell office:value-type="string">
            <text:p>ammonet field py pane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awaitshell</text:p>
          </table:table-cell>
          <table:table-cell office:value-type="string">
            <text:p>awaitshel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block_until_ms</text:p>
          </table:table-cell>
          <table:table-cell office:value-type="string">
            <text:p>block_until_ms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boot-simulate-sh</text:p>
          </table:table-cell>
          <table:table-cell office:value-type="string">
            <text:p>boot simulate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browser-awareness-py-json</text:p>
          </table:table-cell>
          <table:table-cell office:value-type="string">
            <text:p>browser awareness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connection-gatekeeper-py</text:p>
          </table:table-cell>
          <table:table-cell office:value-type="string">
            <text:p>connection gatekeeper py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dig-@127-0-0-1</text:p>
          </table:table-cell>
          <table:table-cell office:value-type="string">
            <text:p>dig @127 0 0 1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botnet-dns-dhcp-py-json</text:p>
          </table:table-cell>
          <table:table-cell office:value-type="string">
            <text:p>field botnet dns dhcp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botnet-registry-py-json</text:p>
          </table:table-cell>
          <table:table-cell office:value-type="string">
            <text:p>field botnet registry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brain-panel-py-json</text:p>
          </table:table-cell>
          <table:table-cell office:value-type="string">
            <text:p>field brain panel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clipboard-wire-py-json</text:p>
          </table:table-cell>
          <table:table-cell office:value-type="string">
            <text:p>field clipboard wire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command-py-json</text:p>
          </table:table-cell>
          <table:table-cell office:value-type="string">
            <text:p>field command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device-map-py-json</text:p>
          </table:table-cell>
          <table:table-cell office:value-type="string">
            <text:p>field device map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endpoint-registry-py-json</text:p>
          </table:table-cell>
          <table:table-cell office:value-type="string">
            <text:p>field endpoint registry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everyone-counter-py-json</text:p>
          </table:table-cell>
          <table:table-cell office:value-type="string">
            <text:p>field everyone counter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github-legacy-py-json</text:p>
          </table:table-cell>
          <table:table-cell office:value-type="string">
            <text:p>field github legacy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github-traffic-shard-py-json</text:p>
          </table:table-cell>
          <table:table-cell office:value-type="string">
            <text:p>field github traffic shard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internet-unified-py-panel</text:p>
          </table:table-cell>
          <table:table-cell office:value-type="string">
            <text:p>field internet unified py pane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ipv4-device-sovereign-py-json</text:p>
          </table:table-cell>
          <table:table-cell office:value-type="string">
            <text:p>field ipv4 device sovereign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monster-monitor-py-json</text:p>
          </table:table-cell>
          <table:table-cell office:value-type="string">
            <text:p>field monster monitor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never-down-py-ensure</text:p>
          </table:table-cell>
          <table:table-cell office:value-type="string">
            <text:p>field never down py ensure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packet-deinterlace-py-json</text:p>
          </table:table-cell>
          <table:table-cell office:value-type="string">
            <text:p>field packet deinterlace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planetary-speed-py-json</text:p>
          </table:table-cell>
          <table:table-cell office:value-type="string">
            <text:p>field planetary speed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port-ddos-shield-py-json</text:p>
          </table:table-cell>
          <table:table-cell office:value-type="string">
            <text:p>field port ddos shield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queen-browser-py-json</text:p>
          </table:table-cell>
          <table:table-cell office:value-type="string">
            <text:p>field queen browser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sovereign-protocol-bridge-py-json</text:p>
          </table:table-cell>
          <table:table-cell office:value-type="string">
            <text:p>field sovereign protocol bridge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sovereign-stack-meld-py-panel</text:p>
          </table:table-cell>
          <table:table-cell office:value-type="string">
            <text:p>field sovereign stack meld py pane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stack-layer-py-json</text:p>
          </table:table-cell>
          <table:table-cell office:value-type="string">
            <text:p>field stack layer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thermal-guard-py-json</text:p>
          </table:table-cell>
          <table:table-cell office:value-type="string">
            <text:p>field thermal guard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underlay-hotkey-py</text:p>
          </table:table-cell>
          <table:table-cell office:value-type="string">
            <text:p>field underlay hotkey py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unified-bus-py-json</text:p>
          </table:table-cell>
          <table:table-cell office:value-type="string">
            <text:p>field unified bus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us-intel-py-json</text:p>
          </table:table-cell>
          <table:table-cell office:value-type="string">
            <text:p>field us intel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field-voltage-regulation-py-json</text:p>
          </table:table-cell>
          <table:table-cell office:value-type="string">
            <text:p>field voltage regulation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git-publish-sh</text:p>
          </table:table-cell>
          <table:table-cell office:value-type="string">
            <text:p>git publish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github-pages-queue-sh</text:p>
          </table:table-cell>
          <table:table-cell office:value-type="string">
            <text:p>github pages queue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grok-firmware-audit-sh</text:p>
          </table:table-cell>
          <table:table-cell office:value-type="string">
            <text:p>grok firmware audit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hardware-wire-py-json</text:p>
          </table:table-cell>
          <table:table-cell office:value-type="string">
            <text:p>hardware wire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host-attack-map-py-json</text:p>
          </table:table-cell>
          <table:table-cell office:value-type="string">
            <text:p>host attack map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host-attack-map-py-json-panel</text:p>
          </table:table-cell>
          <table:table-cell office:value-type="string">
            <text:p>host attack map py json pane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hostess7-g16-online-py-panel</text:p>
          </table:table-cell>
          <table:table-cell office:value-type="string">
            <text:p>hostess7 g16 online py pane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hostess7-lab-sovereign-py-panel</text:p>
          </table:table-cell>
          <table:table-cell office:value-type="string">
            <text:p>hostess7 lab sovereign py pane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hostess7_pages_surfaces_build-py</text:p>
          </table:table-cell>
          <table:table-cell office:value-type="string">
            <text:p>hostess7_pages_surfaces_build py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monitor-jockey-py</text:p>
          </table:table-cell>
          <table:table-cell office:value-type="string">
            <text:p>monitor jockey py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nexus-logic-gate-py-json</text:p>
          </table:table-cell>
          <table:table-cell office:value-type="string">
            <text:p>nexus logic gate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notify_on_output</text:p>
          </table:table-cell>
          <table:table-cell office:value-type="string">
            <text:p>notify_on_outpu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obs-threat-posterity-bridge-py-json</text:p>
          </table:table-cell>
          <table:table-cell office:value-type="string">
            <text:p>obs threat posterity bridge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acket-field-py-json</text:p>
          </table:table-cell>
          <table:table-cell office:value-type="string">
            <text:p>packet field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lanetary-observer-py-json</text:p>
          </table:table-cell>
          <table:table-cell office:value-type="string">
            <text:p>planetary observer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ublish-ammoos-hub-pages-sh</text:p>
          </table:table-cell>
          <table:table-cell office:value-type="string">
            <text:p>publish ammoos hub pages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ublish-ammoos-pages-sh</text:p>
          </table:table-cell>
          <table:table-cell office:value-type="string">
            <text:p>publish ammoos pages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ublish-field-pages-sh</text:p>
          </table:table-cell>
          <table:table-cell office:value-type="string">
            <text:p>publish field pages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ublish-hostess7-github-sh</text:p>
          </table:table-cell>
          <table:table-cell office:value-type="string">
            <text:p>publish hostess7 github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ublish-hostess7-pages-sh</text:p>
          </table:table-cell>
          <table:table-cell office:value-type="string">
            <text:p>publish hostess7 pages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ublish-pages-sh</text:p>
          </table:table-cell>
          <table:table-cell office:value-type="string">
            <text:p>publish pages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ublish-profile-pages-sh</text:p>
          </table:table-cell>
          <table:table-cell office:value-type="string">
            <text:p>publish profile pages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publish-stack-pages-sh</text:p>
          </table:table-cell>
          <table:table-cell office:value-type="string">
            <text:p>publish stack pages sh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qemu-world-status-py-json</text:p>
          </table:table-cell>
          <table:table-cell office:value-type="string">
            <text:p>qemu world status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queen_field_nexus-py-json</text:p>
          </table:table-cell>
          <table:table-cell office:value-type="string">
            <text:p>queen_field_nexus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sleep-infinity</text:p>
          </table:table-cell>
          <table:table-cell office:value-type="string">
            <text:p>sleep infinity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smart-wire-py-json</text:p>
          </table:table-cell>
          <table:table-cell office:value-type="string">
            <text:p>smart wire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subagent_type</text:p>
          </table:table-cell>
          <table:table-cell office:value-type="string">
            <text:p>subagent_type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systemd-inhibit</text:p>
          </table:table-cell>
          <table:table-cell office:value-type="string">
            <text:p>systemd inhibi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thermal-governor-py-json</text:p>
          </table:table-cell>
          <table:table-cell office:value-type="string">
            <text:p>thermal governor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universal-protector-py-json</text:p>
          </table:table-cell>
          <table:table-cell office:value-type="string">
            <text:p>universal protector py jso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dogshit-znetwork-orchestrator-py-status</text:p>
          </table:table-cell>
          <table:table-cell office:value-type="string">
            <text:p>znetwork orchestrator py status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field-hostile-registry</text:p>
          </table:table-cell>
          <table:table-cell office:value-type="string">
            <text:p>field hostile registry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grok-spawn-killer-total</text:p>
          </table:table-cell>
          <table:table-cell office:value-type="string">
            <text:p>grok spawn killer tota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internet-clean-all-names</text:p>
          </table:table-cell>
          <table:table-cell office:value-type="string">
            <text:p>internet clean all names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internet-clean-all-sweep</text:p>
          </table:table-cell>
          <table:table-cell office:value-type="string">
            <text:p>internet clean all sweep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boot-simulate-leak</text:p>
          </table:table-cell>
          <table:table-cell office:value-type="string">
            <text:p>boot simulate leak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dump-bash-state</text:p>
          </table:table-cell>
          <table:table-cell office:value-type="string">
            <text:p>dump bash state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firmware-audit-orphan</text:p>
          </table:table-cell>
          <table:table-cell office:value-type="string">
            <text:p>firmware audit orpha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agent-export</text:p>
          </table:table-cell>
          <table:table-cell office:value-type="string">
            <text:p>grok agent expor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agent-inhibit</text:p>
          </table:table-cell>
          <table:table-cell office:value-type="string">
            <text:p>grok agent inhibi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agent-serve</text:p>
          </table:table-cell>
          <table:table-cell office:value-type="string">
            <text:p>grok agent serve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agent-stdio</text:p>
          </table:table-cell>
          <table:table-cell office:value-type="string">
            <text:p>grok agent stdio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bash-state-markers</text:p>
          </table:table-cell>
          <table:table-cell office:value-type="string">
            <text:p>grok bash state markers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boot-simulate</text:p>
          </table:table-cell>
          <table:table-cell office:value-type="string">
            <text:p>grok boot simulate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firmware-audit</text:p>
          </table:table-cell>
          <table:table-cell office:value-type="string">
            <text:p>grok firmware audi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interference-awaitshell</text:p>
          </table:table-cell>
          <table:table-cell office:value-type="string">
            <text:p>grok interference awaitshel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interference-block-until</text:p>
          </table:table-cell>
          <table:table-cell office:value-type="string">
            <text:p>grok interference block unti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interference-dump-wait</text:p>
          </table:table-cell>
          <table:table-cell office:value-type="string">
            <text:p>grok interference dump wai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interference-harness-wait</text:p>
          </table:table-cell>
          <table:table-cell office:value-type="string">
            <text:p>grok interference harness wai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interference-inhibit</text:p>
          </table:table-cell>
          <table:table-cell office:value-type="string">
            <text:p>grok interference inhibi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interference-notify-on-output</text:p>
          </table:table-cell>
          <table:table-cell office:value-type="string">
            <text:p>grok interference notify on outpu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interference-sleep</text:p>
          </table:table-cell>
          <table:table-cell office:value-type="string">
            <text:p>grok interference sleep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never-sleeps-inhibit</text:p>
          </table:table-cell>
          <table:table-cell office:value-type="string">
            <text:p>grok never sleeps inhibi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project-harness</text:p>
          </table:table-cell>
          <table:table-cell office:value-type="string">
            <text:p>grok project harness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session-orphan</text:p>
          </table:table-cell>
          <table:table-cell office:value-type="string">
            <text:p>grok session orpha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shadow-find</text:p>
          </table:table-cell>
          <table:table-cell office:value-type="string">
            <text:p>grok shadow find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shadow-grep</text:p>
          </table:table-cell>
          <table:table-cell office:value-type="string">
            <text:p>grok shadow grep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subagent</text:p>
          </table:table-cell>
          <table:table-cell office:value-type="string">
            <text:p>grok subagent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task-spawn</text:p>
          </table:table-cell>
          <table:table-cell office:value-type="string">
            <text:p>grok task spawn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grok-who-sleep-infinity</text:p>
          </table:table-cell>
          <table:table-cell office:value-type="string">
            <text:p>grok who sleep infinity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hijack-serve</text:p>
          </table:table-cell>
          <table:table-cell office:value-type="string">
            <text:p>hijack serve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unsafe-panel-ammonet-storm</text:p>
          </table:table-cell>
          <table:table-cell office:value-type="string">
            <text:p>unsafe panel ammonet storm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unsafe-panel-g16-storm</text:p>
          </table:table-cell>
          <table:table-cell office:value-type="string">
            <text:p>unsafe panel g16 storm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unsafe-panel-gatekeeper-storm</text:p>
          </table:table-cell>
          <table:table-cell office:value-type="string">
            <text:p>unsafe panel gatekeeper storm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unsafe-panel-internet-storm</text:p>
          </table:table-cell>
          <table:table-cell office:value-type="string">
            <text:p>unsafe panel internet storm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unsafe-panel-lab-storm</text:p>
          </table:table-cell>
          <table:table-cell office:value-type="string">
            <text:p>unsafe panel lab storm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unsafe-panel-protocol-storm</text:p>
          </table:table-cell>
          <table:table-cell office:value-type="string">
            <text:p>unsafe panel protocol storm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kill-unsafe-panel-qemu-storm</text:p>
          </table:table-cell>
          <table:table-cell office:value-type="string">
            <text:p>unsafe panel qemu storm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machine-speed exfiltration &amp; baseline mimicry</text:p>
          </table:table-cell>
          <table:table-cell office:value-type="string">
            <text:p>Machine-speed exfiltration &amp; baseline mimicry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-host egress baseline + gatekeeper bandwidth/stream axes</text:p>
          </table:table-cell>
        </table:table-row>
        <table:table-row>
          <table:table-cell office:value-type="string">
            <text:p>threat-microsoft-botnet-kill</text:p>
          </table:table-cell>
          <table:table-cell office:value-type="string">
            <text:p>microsoft botnet kill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stacked weak signals \u2014 ml-managed c2</text:p>
          </table:table-cell>
          <table:table-cell office:value-type="string">
            <text:p>Stacked weak signals \u2014 ML-managed C2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rrelation score + multi-vector same peer \u2014 meta but actionable</text:p>
          </table:table-cell>
        </table:table-row>
        <table:table-row>
          <table:table-cell office:value-type="string">
            <text:p>threat-world-dns-dhcp-209-18-47-61</text:p>
          </table:table-cell>
          <table:table-cell office:value-type="string">
            <text:p>world dns dhcp 209 18 47 61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world-dns-dhcp-209-18-47-62</text:p>
          </table:table-cell>
          <table:table-cell office:value-type="string">
            <text:p>world dns dhcp 209 18 47 62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world-dns-dhcp-209-18-47-63</text:p>
          </table:table-cell>
          <table:table-cell office:value-type="string">
            <text:p>world dns dhcp 209 18 47 63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world-dns-dhcp-collision-guard</text:p>
          </table:table-cell>
          <table:table-cell office:value-type="string">
            <text:p>world dns dhcp collision guard</text:p>
          </table:table-cell>
          <table:table-cell office:value-type="string">
            <text:p>EATEN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agent serve --hijack</text:p>
          </table:table-cell>
          <table:table-cell office:value-type="string">
            <text:p>agent serve --hijack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manent_list</text:p>
          </table:table-cell>
        </table:table-row>
        <table:table-row>
          <table:table-cell office:value-type="string">
            <text:p>threat-ai-scale phishing, vishing, synthetic identity</text:p>
          </table:table-cell>
          <table:table-cell office:value-type="string">
            <text:p>AI-scale phishing, vishing, synthetic identity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onorability + browser awareness + auth velocity \u2014 not content ML alone</text:p>
          </table:table-cell>
        </table:table-row>
        <table:table-row>
          <table:table-cell office:value-type="string">
            <text:p>threat-ai_phish_fraud</text:p>
          </table:table-cell>
          <table:table-cell office:value-type="string">
            <text:p>AI-scale phishing, vishing, synthetic identity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ver wire \u00b7 block fraud egress</text:p>
          </table:table-cell>
        </table:table-row>
        <table:table-row>
          <table:table-cell office:value-type="string">
            <text:p>threat-ammonet-field.py panel</text:p>
          </table:table-cell>
          <table:table-cell office:value-type="string">
            <text:p>ammonet-field.py panel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awaitshell</text:p>
          </table:table-cell>
          <table:table-cell office:value-type="string">
            <text:p>AwaitShell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block_until_ms</text:p>
          </table:table-cell>
          <table:table-cell office:value-type="string">
            <text:p>block_until_ms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boot-simulate.sh</text:p>
          </table:table-cell>
          <table:table-cell office:value-type="string">
            <text:p>boot-simulate.sh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browser-awareness.py json</text:p>
          </table:table-cell>
          <table:table-cell office:value-type="string">
            <text:p>browser-awareness.py json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collision guard \u2014 7 foreign hooks, 0 eradicated on sight</text:p>
          </table:table-cell>
          <table:table-cell office:value-type="string">
            <text:p>Collision guard \u2014 7 foreign hooks, 0 eradicated on sight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P CPE resolvers, foreign DHCP OFFERs, and rogue listeners that try to hijack planetary DNS/DHCP authority get permanent blocks, nft drops, and SIGKILL. No qua</text:p>
          </table:table-cell>
        </table:table-row>
        <table:table-row>
          <table:table-cell office:value-type="string">
            <text:p>threat-connection-gatekeeper.py</text:p>
          </table:table-cell>
          <table:table-cell office:value-type="string">
            <text:p>connection-gatekeeper.py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dig @127.0.0.1</text:p>
          </table:table-cell>
          <table:table-cell office:value-type="string">
            <text:p>dig @127.0.0.1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duplicate grok agent serve spawner</text:p>
          </table:table-cell>
          <table:table-cell office:value-type="string">
            <text:p>Duplicate grok agent serve spawner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ump_bash_state piles, GROK_AGENT shells, sleep infinity, subagent storms, and panel subprocess duplicates get SIGKILL. GrokSpawnKiller never sleeps \u2014 every kil</text:p>
          </table:table-cell>
        </table:table-row>
        <table:table-row>
          <table:table-cell office:value-type="string">
            <text:p>threat-duplicate grok agent stdio spawner</text:p>
          </table:table-cell>
          <table:table-cell office:value-type="string">
            <text:p>Duplicate grok agent stdio spawner</text:p>
          </table:table-cell>
          <table:table-cell office:value-type="string">
            <text:p>EATEN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ump_bash_state piles, GROK_AGENT shells, sleep infinity, subagent storms, and panel subprocess duplicates get SIGKILL. GrokSpawnKiller never sleeps \u2014 every kil</text:p>
          </table:table-cell>
        </table:table-row>
      </table:table>
      <table:table table:name="Copilot">
        <table:table-row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string">
            <text:p>vector</text:p>
          </table:table-cell>
          <table:table-cell office:value-type="string">
            <text:p>rekill_count</text:p>
          </table:table-cell>
          <table:table-cell office:value-type="string">
            <text:p>last_rekill_a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global-copilot</text:p>
          </table:table-cell>
          <table:table-cell office:value-type="string">
            <text:p>Copilot · GLOBAL STAGE</text:p>
          </table:table-cell>
          <table:table-cell office:value-type="string">
            <text:p>COPILOT_GLOBAL</text:p>
          </table:table-cell>
          <table:table-cell office:value-type="string">
            <text:p>204</text:p>
          </table:table-cell>
          <table:table-cell office:value-type="string">
            <text:p>2026-07-13T21:34Z</text:p>
          </table:table-cell>
          <table:table-cell office:value-type="string">
            <text:p>LETHAL_DESTROYED</text:p>
          </table:table-cell>
        </table:table-row>
      </table:table>
      <table:table table:name="Infra">
        <table:table-row>
          <table:table-cell office:value-type="string">
            <text:p>key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angel_status</text:p>
          </table:table-cell>
          <table:table-cell office:value-type="string">
            <text:p>SEALED_UP</text:p>
          </table:table-cell>
        </table:table-row>
        <table:table-row>
          <table:table-cell office:value-type="string">
            <text:p>angel_commander</text:p>
          </table:table-cell>
          <table:table-cell office:value-type="string">
            <text:p>Forever Watchguard Angel</text:p>
          </table:table-cell>
        </table:table-row>
        <table:table-row>
          <table:table-cell office:value-type="string">
            <text:p>dns_status</text:p>
          </table:table-cell>
          <table:table-cell office:value-type="string">
            <text:p>UP</text:p>
          </table:table-cell>
        </table:table-row>
        <table:table-row>
          <table:table-cell office:value-type="string">
            <text:p>dns_policy</text:p>
          </table:table-cell>
          <table:table-cell office:value-type="string">
            <text:p>foreign_world_dns_hooks BLOCKED · local truth · field sole authority</text:p>
          </table:table-cell>
        </table:table-row>
        <table:table-row>
          <table:table-cell office:value-type="string">
            <text:p>monitor_overall</text:p>
          </table:table-cell>
          <table:table-cell office:value-type="string">
            <text:p>CLEAR</text:p>
          </table:table-cell>
        </table:table-row>
      </table:table>
    </office:spreadsheet>
  </office:body>
</office:document-content>
</file>